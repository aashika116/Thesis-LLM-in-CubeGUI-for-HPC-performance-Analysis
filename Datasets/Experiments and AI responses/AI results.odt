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3.0104in"/>
    </style:style>
    <style:style style:name="Table1.B" style:family="table-column">
      <style:table-column-properties style:column-width="3.6826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6118in"/>
    </style:style>
    <style:style style:name="Table2.B" style:family="table-column">
      <style:table-column-properties style:column-width="2.491in"/>
    </style:style>
    <style:style style:name="Table2.C" style:family="table-column">
      <style:table-column-properties style:column-width="2.5903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3.4604in"/>
    </style:style>
    <style:style style:name="Table3.B" style:family="table-column">
      <style:table-column-properties style:column-width="2.2569in"/>
    </style:style>
    <style:style style:name="Table3.C" style:family="table-column">
      <style:table-column-properties style:column-width="0.9757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4028in"/>
    </style:style>
    <style:style style:name="Table4.B" style:family="table-column">
      <style:table-column-properties style:column-width="2.4771in"/>
    </style:style>
    <style:style style:name="Table4.C" style:family="table-column">
      <style:table-column-properties style:column-width="2.8132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5396in"/>
    </style:style>
    <style:style style:name="Table5.B" style:family="table-column">
      <style:table-column-properties style:column-width="1.984in"/>
    </style:style>
    <style:style style:name="Table5.C" style:family="table-column">
      <style:table-column-properties style:column-width="3.1694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2931in"/>
    </style:style>
    <style:style style:name="Table6.B" style:family="table-column">
      <style:table-column-properties style:column-width="2.3771in"/>
    </style:style>
    <style:style style:name="Table6.C" style:family="table-column">
      <style:table-column-properties style:column-width="3.0229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8465in"/>
    </style:style>
    <style:style style:name="Table7.B" style:family="table-column">
      <style:table-column-properties style:column-width="4.8465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2917in"/>
    </style:style>
    <style:style style:name="Table8.B" style:family="table-column">
      <style:table-column-properties style:column-width="1.209in"/>
    </style:style>
    <style:style style:name="Table8.C" style:family="table-column">
      <style:table-column-properties style:column-width="5.1924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8236in"/>
    </style:style>
    <style:style style:name="Table9.B" style:family="table-column">
      <style:table-column-properties style:column-width="2.0625in"/>
    </style:style>
    <style:style style:name="Table9.C" style:family="table-column">
      <style:table-column-properties style:column-width="2.8069in"/>
    </style:style>
    <style:style style:name="Table9.A1" style:family="table-cell">
      <style:table-cell-properties style:vertical-align="middle" fo:padding="0.0194in" fo:border="none"/>
    </style:style>
    <style:style style:name="Table10" style:family="table">
      <style:table-properties style:width="6.2007in" fo:margin-left="0.4924in" table:align="left"/>
    </style:style>
    <style:style style:name="Table10.A" style:family="table-column">
      <style:table-column-properties style:column-width="0.9583in"/>
    </style:style>
    <style:style style:name="Table10.B" style:family="table-column">
      <style:table-column-properties style:column-width="5.2424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1535in"/>
    </style:style>
    <style:style style:name="Table11.B" style:family="table-column">
      <style:table-column-properties style:column-width="3.5528in"/>
    </style:style>
    <style:style style:name="Table11.C" style:family="table-column">
      <style:table-column-properties style:column-width="1.9868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1.5021in"/>
    </style:style>
    <style:style style:name="Table12.B" style:family="table-column">
      <style:table-column-properties style:column-width="2.2625in"/>
    </style:style>
    <style:style style:name="Table12.C" style:family="table-column">
      <style:table-column-properties style:column-width="2.9285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1.525in"/>
    </style:style>
    <style:style style:name="Table13.B" style:family="table-column">
      <style:table-column-properties style:column-width="5.1681in"/>
    </style:style>
    <style:style style:name="Table13.A1" style:family="table-cell">
      <style:table-cell-properties style:vertical-align="middle" fo:padding="0.0194in" fo:border="none"/>
    </style:style>
    <style:style style:name="Table14" style:family="table">
      <style:table-properties style:width="6.6931in" table:align="left"/>
    </style:style>
    <style:style style:name="Table14.A" style:family="table-column">
      <style:table-column-properties style:column-width="1.7875in"/>
    </style:style>
    <style:style style:name="Table14.B" style:family="table-column">
      <style:table-column-properties style:column-width="4.9056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1.3674in"/>
    </style:style>
    <style:style style:name="Table15.B" style:family="table-column">
      <style:table-column-properties style:column-width="2.9639in"/>
    </style:style>
    <style:style style:name="Table15.C" style:family="table-column">
      <style:table-column-properties style:column-width="2.3618in"/>
    </style:style>
    <style:style style:name="Table15.A1" style:family="table-cell">
      <style:table-cell-properties style:vertical-align="middle" fo:padding="0.0194in" fo:border="none"/>
    </style:style>
    <style:style style:name="Table16" style:family="table">
      <style:table-properties style:width="6.6931in" table:align="left"/>
    </style:style>
    <style:style style:name="Table16.A" style:family="table-column">
      <style:table-column-properties style:column-width="2.0382in"/>
    </style:style>
    <style:style style:name="Table16.B" style:family="table-column">
      <style:table-column-properties style:column-width="2.2188in"/>
    </style:style>
    <style:style style:name="Table16.C" style:family="table-column">
      <style:table-column-properties style:column-width="2.4361in"/>
    </style:style>
    <style:style style:name="Table16.A1" style:family="table-cell">
      <style:table-cell-properties style:vertical-align="middle" fo:padding="0.0194in" fo:border="none"/>
    </style:style>
    <style:style style:name="Table17" style:family="table">
      <style:table-properties style:width="6.6931in" table:align="left"/>
    </style:style>
    <style:style style:name="Table17.A" style:family="table-column">
      <style:table-column-properties style:column-width="0.3986in"/>
    </style:style>
    <style:style style:name="Table17.B" style:family="table-column">
      <style:table-column-properties style:column-width="2.5833in"/>
    </style:style>
    <style:style style:name="Table17.C" style:family="table-column">
      <style:table-column-properties style:column-width="3.7111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1.2799in"/>
    </style:style>
    <style:style style:name="Table18.B" style:family="table-column">
      <style:table-column-properties style:column-width="2.5799in"/>
    </style:style>
    <style:style style:name="Table18.C" style:family="table-column">
      <style:table-column-properties style:column-width="2.8333in"/>
    </style:style>
    <style:style style:name="Table18.A1" style:family="table-cell">
      <style:table-cell-properties style:vertical-align="middle" fo:padding="0.0194in" fo:border="none"/>
    </style:style>
    <style:style style:name="Table19" style:family="table">
      <style:table-properties style:width="6.6931in" table:align="left"/>
    </style:style>
    <style:style style:name="Table19.A" style:family="table-column">
      <style:table-column-properties style:column-width="2.334in"/>
    </style:style>
    <style:style style:name="Table19.B" style:family="table-column">
      <style:table-column-properties style:column-width="2.5965in"/>
    </style:style>
    <style:style style:name="Table19.C" style:family="table-column">
      <style:table-column-properties style:column-width="1.7625in"/>
    </style:style>
    <style:style style:name="Table19.A1" style:family="table-cell">
      <style:table-cell-properties style:vertical-align="middle" fo:padding="0.0194in" fo:border="none"/>
    </style:style>
    <style:style style:name="Table20" style:family="table">
      <style:table-properties style:width="6.6931in" table:align="left"/>
    </style:style>
    <style:style style:name="Table20.A" style:family="table-column">
      <style:table-column-properties style:column-width="1.4972in"/>
    </style:style>
    <style:style style:name="Table20.B" style:family="table-column">
      <style:table-column-properties style:column-width="2.409in"/>
    </style:style>
    <style:style style:name="Table20.C" style:family="table-column">
      <style:table-column-properties style:column-width="2.7868in"/>
    </style:style>
    <style:style style:name="Table20.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1.6063in"/>
    </style:style>
    <style:style style:name="Table21.B" style:family="table-column">
      <style:table-column-properties style:column-width="5.0868in"/>
    </style:style>
    <style:style style:name="Table21.A1" style:family="table-cell">
      <style:table-cell-properties style:vertical-align="middle" fo:padding="0.0194in" fo:border="none"/>
    </style:style>
    <style:style style:name="Table22" style:family="table">
      <style:table-properties style:width="6.6931in" table:align="left"/>
    </style:style>
    <style:style style:name="Table22.A" style:family="table-column">
      <style:table-column-properties style:column-width="0.2917in"/>
    </style:style>
    <style:style style:name="Table22.B" style:family="table-column">
      <style:table-column-properties style:column-width="6.4014in"/>
    </style:style>
    <style:style style:name="Table22.A1" style:family="table-cell">
      <style:table-cell-properties style:vertical-align="middle" fo:padding="0.0194in" fo:border="none"/>
    </style:style>
    <style:style style:name="Table23" style:family="table">
      <style:table-properties style:width="6.6931in" table:align="left"/>
    </style:style>
    <style:style style:name="Table23.A" style:family="table-column">
      <style:table-column-properties style:column-width="1.6021in"/>
    </style:style>
    <style:style style:name="Table23.B" style:family="table-column">
      <style:table-column-properties style:column-width="1.8014in"/>
    </style:style>
    <style:style style:name="Table23.C" style:family="table-column">
      <style:table-column-properties style:column-width="3.2896in"/>
    </style:style>
    <style:style style:name="Table23.A1" style:family="table-cell">
      <style:table-cell-properties style:vertical-align="middle" fo:padding="0.0194in" fo:border="none"/>
    </style:style>
    <style:style style:name="Table24" style:family="table">
      <style:table-properties style:width="6.6931in" table:align="left"/>
    </style:style>
    <style:style style:name="Table24.A" style:family="table-column">
      <style:table-column-properties style:column-width="2.4042in"/>
    </style:style>
    <style:style style:name="Table24.B" style:family="table-column">
      <style:table-column-properties style:column-width="4.2889in"/>
    </style:style>
    <style:style style:name="Table24.A1" style:family="table-cell">
      <style:table-cell-properties style:vertical-align="middle" fo:padding="0.0194in" fo:border="none"/>
    </style:style>
    <style:style style:name="Table25" style:family="table">
      <style:table-properties style:width="6.6931in" table:align="left"/>
    </style:style>
    <style:style style:name="Table25.A" style:family="table-column">
      <style:table-column-properties style:column-width="1.3736in"/>
    </style:style>
    <style:style style:name="Table25.B" style:family="table-column">
      <style:table-column-properties style:column-width="5.3194in"/>
    </style:style>
    <style:style style:name="Table25.A1" style:family="table-cell">
      <style:table-cell-properties style:vertical-align="middle" fo:padding="0.0194in" fo:border="none"/>
    </style:style>
    <style:style style:name="Table26" style:family="table">
      <style:table-properties style:width="6.6931in" table:align="left"/>
    </style:style>
    <style:style style:name="Table26.A" style:family="table-column">
      <style:table-column-properties style:column-width="2.1229in"/>
    </style:style>
    <style:style style:name="Table26.B" style:family="table-column">
      <style:table-column-properties style:column-width="4.5701in"/>
    </style:style>
    <style:style style:name="Table26.A1" style:family="table-cell">
      <style:table-cell-properties style:vertical-align="middle" fo:padding="0.0194in" fo:border="none"/>
    </style:style>
    <style:style style:name="Table27" style:family="table">
      <style:table-properties style:width="6.6931in" table:align="left"/>
    </style:style>
    <style:style style:name="Table27.A" style:family="table-column">
      <style:table-column-properties style:column-width="0.3986in"/>
    </style:style>
    <style:style style:name="Table27.B" style:family="table-column">
      <style:table-column-properties style:column-width="3.4833in"/>
    </style:style>
    <style:style style:name="Table27.C" style:family="table-column">
      <style:table-column-properties style:column-width="2.8111in"/>
    </style:style>
    <style:style style:name="Table27.A1" style:family="table-cell">
      <style:table-cell-properties style:vertical-align="middle" fo:padding="0.0194in" fo:border="none"/>
    </style:style>
    <style:style style:name="P1" style:family="paragraph" style:parent-style-name="Standard">
      <style:text-properties officeooo:rsid="000587d2" officeooo:paragraph-rsid="000587d2"/>
    </style:style>
    <style:style style:name="P2" style:family="paragraph" style:parent-style-name="Text_20_body">
      <style:paragraph-properties fo:margin-left="0in" fo:margin-right="0in" fo:text-align="start" style:justify-single-word="false" fo:text-indent="0in" style:auto-text-indent="false" style:writing-mode="lr-tb"/>
    </style:style>
    <style:style style:name="P3" style:family="paragraph" style:parent-style-name="Heading_20_2">
      <style:paragraph-properties fo:margin-left="0in" fo:margin-right="0in" fo:text-align="start" style:justify-single-word="false" fo:text-indent="0in" style:auto-text-indent="false" style:writing-mode="lr-tb"/>
    </style:style>
    <style:style style:name="P4" style:family="paragraph" style:parent-style-name="Heading_20_3">
      <style:paragraph-properties fo:margin-left="0in" fo:margin-right="0in" fo:text-align="start" style:justify-single-word="false" fo:text-indent="0in" style:auto-text-indent="false" style:writing-mode="lr-tb"/>
    </style:style>
    <style:style style:name="P5" style:family="paragraph" style:parent-style-name="Preformatted_20_Text">
      <style:paragraph-properties fo:margin-left="0in" fo:margin-right="0in" fo:text-align="start" style:justify-single-word="false" fo:text-indent="0in" style:auto-text-indent="false" style:writing-mode="lr-tb"/>
    </style:style>
    <style:style style:name="P6" style:family="paragraph" style:parent-style-name="Heading_20_2">
      <style:paragraph-properties fo:text-align="start" style:justify-single-word="false" style:writing-mode="lr-tb"/>
    </style:style>
    <style:style style:name="P7" style:family="paragraph" style:parent-style-name="Heading_20_3">
      <style:paragraph-properties fo:text-align="start" style:justify-single-word="false" style:writing-mode="lr-tb"/>
    </style:style>
    <style:style style:name="P8" style:family="paragraph" style:parent-style-name="Heading_20_4">
      <style:paragraph-properties fo:text-align="start" style:justify-single-word="false" style:writing-mode="lr-tb"/>
    </style:style>
    <style:style style:name="P9" style:family="paragraph" style:parent-style-name="Horizontal_20_Line">
      <style:paragraph-properties fo:text-align="start" style:justify-single-word="false" style:writing-mode="lr-tb"/>
    </style:style>
    <style:style style:name="P10" style:family="paragraph" style:parent-style-name="Preformatted_20_Text">
      <style:paragraph-properties fo:text-align="start" style:justify-single-word="false" style:writing-mode="lr-tb"/>
    </style:style>
    <style:style style:name="P11" style:family="paragraph" style:parent-style-name="Quotations">
      <style:paragraph-properties fo:text-align="start" style:justify-single-word="false" style:writing-mode="lr-tb"/>
    </style:style>
    <style:style style:name="P12" style:family="paragraph" style:parent-style-name="Text_20_body">
      <style:paragraph-properties fo:text-align="start" style:justify-single-word="false" style:writing-mode="lr-tb"/>
    </style:style>
    <style:style style:name="P13" style:family="paragraph" style:parent-style-name="Preformatted_20_Text">
      <style:paragraph-properties fo:margin-top="0in" fo:margin-bottom="0.1965in" style:contextual-spacing="false" fo:text-align="start" style:justify-single-word="false" style:writing-mode="lr-tb"/>
    </style:style>
    <style:style style:name="P14" style:family="paragraph" style:parent-style-name="Text_20_body">
      <style:paragraph-properties fo:margin-left="0in" fo:margin-right="0in" fo:margin-top="0in" fo:margin-bottom="0in" style:contextual-spacing="false" fo:text-indent="0in" style:auto-text-indent="false" style:writing-mode="lr-tb"/>
      <style:text-properties loext:padding="0.0193in" loext:border="0.51pt solid #000000"/>
    </style:style>
    <style:style style:name="P15" style:family="paragraph" style:parent-style-name="Preformatted_20_Text">
      <style:paragraph-properties fo:margin-top="0in" fo:margin-bottom="0.1965in" style:contextual-spacing="false"/>
    </style:style>
    <style:style style:name="P16" style:family="paragraph" style:parent-style-name="Standard">
      <style:text-properties fo:color="#ff0000" loext:opacity="100%" fo:font-size="15pt" fo:font-weight="bold" officeooo:rsid="000808f5" officeooo:paragraph-rsid="000808f5" style:font-size-asian="15pt" style:font-weight-asian="bold" style:font-size-complex="15pt" style:font-weight-complex="bold"/>
    </style:style>
    <style:style style:name="P17" style:family="paragraph" style:parent-style-name="Standard">
      <style:text-properties fo:color="#ff0000" loext:opacity="100%" fo:font-size="15pt" fo:font-weight="bold" officeooo:rsid="000587d2" officeooo:paragraph-rsid="000587d2" style:font-size-asian="15pt" style:font-weight-asian="bold" style:font-size-complex="15pt" style:font-weight-complex="bold"/>
    </style:style>
    <style:style style:name="P18" style:family="paragraph" style:parent-style-name="Text_20_body">
      <style:paragraph-properties fo:margin-left="0in" fo:margin-right="0in" fo:text-align="start" style:justify-single-word="false" fo:text-indent="0in" style:auto-text-indent="false" style:writing-mode="lr-tb"/>
      <style:text-properties fo:color="#ff0000" loext:opacity="100%" fo:font-size="15pt" fo:font-weight="bold" officeooo:paragraph-rsid="000808f5" style:font-size-asian="15pt" style:font-weight-asian="bold" style:font-size-complex="15pt" style:font-weight-complex="bold"/>
    </style:style>
    <style:style style:name="P19" style:family="paragraph" style:parent-style-name="Text_20_body">
      <style:paragraph-properties fo:margin-left="0in" fo:margin-right="0in" fo:text-align="start" style:justify-single-word="false" fo:text-indent="0in" style:auto-text-indent="false" style:writing-mode="lr-tb"/>
      <style:text-properties fo:color="#ff0000" loext:opacity="100%" fo:font-size="15pt" fo:font-weight="bold" style:font-size-asian="15pt" style:font-weight-asian="bold" style:font-size-complex="15pt" style:font-weight-complex="bold"/>
    </style:style>
    <style:style style:name="P20" style:family="paragraph" style:parent-style-name="Standard">
      <style:text-properties fo:color="#ff0000" loext:opacity="100%" fo:font-size="13pt" fo:font-weight="bold" officeooo:paragraph-rsid="000a1305" style:font-size-asian="13pt" style:font-weight-asian="bold" style:font-size-complex="13pt" style:font-weight-complex="bold"/>
    </style:style>
    <style:style style:name="P21" style:family="paragraph" style:parent-style-name="Text_20_body">
      <style:paragraph-properties fo:margin-left="0in" fo:margin-right="0in" fo:text-align="start" style:justify-single-word="false" fo:text-indent="0in" style:auto-text-indent="false" style:writing-mode="lr-tb"/>
      <style:text-properties fo:color="#ff0000" loext:opacity="100%" fo:font-size="13pt" fo:font-weight="bold" style:font-size-asian="13pt" style:font-weight-asian="bold" style:font-size-complex="13pt" style:font-weight-complex="bold"/>
    </style:style>
    <style:style style:name="P22" style:family="paragraph" style:parent-style-name="Text_20_body">
      <style:paragraph-properties fo:text-align="start" style:justify-single-word="false" style:writing-mode="lr-tb"/>
      <style:text-properties fo:color="#ff0000" loext:opacity="100%" fo:font-size="13pt" fo:font-weight="bold" style:font-size-asian="13pt" style:font-weight-asian="bold" style:font-size-complex="13pt" style:font-weight-complex="bold"/>
    </style:style>
    <style:style style:name="P23" style:family="paragraph" style:parent-style-name="Standard">
      <style:text-properties officeooo:paragraph-rsid="000a6ac0"/>
    </style:style>
    <style:style style:name="P24" style:family="paragraph" style:parent-style-name="Standard">
      <style:text-properties officeooo:paragraph-rsid="000c58a1"/>
    </style:style>
    <style:style style:name="P25" style:family="paragraph" style:parent-style-name="Table_20_Contents">
      <style:text-properties fo:font-size="2pt" style:font-size-asian="2pt" style:font-size-complex="2pt"/>
    </style:style>
    <style:style style:name="P26" style:family="paragraph" style:parent-style-name="Preformatted_20_Text" style:list-style-name="L7">
      <style:paragraph-properties fo:margin-top="0in" fo:margin-bottom="0.1965in" style:contextual-spacing="false"/>
    </style:style>
    <style:style style:name="P27" style:family="paragraph" style:parent-style-name="Preformatted_20_Text" style:list-style-name="L10">
      <style:paragraph-properties fo:margin-top="0in" fo:margin-bottom="0.1965in" style:contextual-spacing="false"/>
    </style:style>
    <style:style style:name="P28" style:family="paragraph" style:parent-style-name="Preformatted_20_Text" style:list-style-name="L12">
      <style:paragraph-properties fo:margin-left="0in" fo:margin-right="0in" fo:text-align="start" style:justify-single-word="false" fo:text-indent="0in" style:auto-text-indent="false" style:writing-mode="lr-tb"/>
    </style:style>
    <style:style style:name="P29" style:family="paragraph" style:parent-style-name="Preformatted_20_Text" style:list-style-name="L12">
      <style:paragraph-properties fo:text-align="start" style:justify-single-word="false" style:writing-mode="lr-tb"/>
    </style:style>
    <style:style style:name="P30" style:family="paragraph" style:parent-style-name="Preformatted_20_Text" style:list-style-name="L12">
      <style:paragraph-properties fo:margin-top="0in" fo:margin-bottom="0.1965in" style:contextual-spacing="false" fo:text-align="start" style:justify-single-word="false" style:writing-mode="lr-tb"/>
    </style:style>
    <style:style style:name="P31" style:family="paragraph" style:parent-style-name="Preformatted_20_Text" style:list-style-name="L33"/>
    <style:style style:name="P32" style:family="paragraph" style:parent-style-name="Preformatted_20_Text" style:list-style-name="L35"/>
    <style:style style:name="P33" style:family="paragraph" style:parent-style-name="Preformatted_20_Text" style:list-style-name="L35">
      <style:paragraph-properties fo:margin-top="0in" fo:margin-bottom="0.1965in" style:contextual-spacing="false"/>
    </style:style>
    <style:style style:name="P34" style:family="paragraph" style:parent-style-name="Standard">
      <style:text-properties fo:color="#ff0000" loext:opacity="100%" fo:font-size="13pt" fo:font-weight="bold" officeooo:paragraph-rsid="000c58a1" style:font-size-asian="13pt" style:font-weight-asian="bold" style:font-size-complex="13pt" style:font-weight-complex="bold"/>
    </style:style>
    <style:style style:name="P35" style:family="paragraph" style:parent-style-name="Text_20_body">
      <style:paragraph-properties fo:margin-left="0in" fo:margin-right="0in" fo:text-align="start" style:justify-single-word="false" fo:text-indent="0in" style:auto-text-indent="false" style:writing-mode="lr-tb"/>
      <style:text-properties fo:color="#ff0000" loext:opacity="100%" fo:font-size="15pt" fo:font-weight="bold" officeooo:rsid="000808f5" officeooo:paragraph-rsid="000808f5" style:font-size-asian="15pt" style:font-weight-asian="bold" style:font-size-complex="15pt" style:font-weight-complex="bold"/>
    </style:style>
    <style:style style:name="P36" style:family="paragraph" style:parent-style-name="Text_20_body" style:list-style-name="L29">
      <style:paragraph-properties fo:margin-top="0in" fo:margin-bottom="0in" style:contextual-spacing="false" fo:text-align="start" style:justify-single-word="false" style:writing-mode="lr-tb"/>
      <style:text-properties fo:color="#ff0000" loext:opacity="100%" fo:font-size="13pt" fo:font-weight="bold" style:font-size-asian="13pt" style:font-weight-asian="bold" style:font-size-complex="13pt" style:font-weight-complex="bold"/>
    </style:style>
    <style:style style:name="P37" style:family="paragraph" style:parent-style-name="Text_20_body" style:list-style-name="L29">
      <style:paragraph-properties fo:text-align="start" style:justify-single-word="false" style:writing-mode="lr-tb"/>
      <style:text-properties fo:color="#ff0000" loext:opacity="100%" fo:font-size="13pt" fo:font-weight="bold" style:font-size-asian="13pt" style:font-weight-asian="bold" style:font-size-complex="13pt" style:font-weight-complex="bold"/>
    </style:style>
    <style:style style:name="P38" style:family="paragraph" style:parent-style-name="Text_20_body" style:list-style-name="L30">
      <style:paragraph-properties fo:margin-top="0in" fo:margin-bottom="0in" style:contextual-spacing="false" fo:text-align="start" style:justify-single-word="false" style:writing-mode="lr-tb"/>
      <style:text-properties fo:color="#ff0000" loext:opacity="100%" fo:font-size="13pt" fo:font-weight="bold" style:font-size-asian="13pt" style:font-weight-asian="bold" style:font-size-complex="13pt" style:font-weight-complex="bold"/>
    </style:style>
    <style:style style:name="P39" style:family="paragraph" style:parent-style-name="Text_20_body" style:list-style-name="L30">
      <style:paragraph-properties fo:text-align="start" style:justify-single-word="false" style:writing-mode="lr-tb"/>
      <style:text-properties fo:color="#ff0000" loext:opacity="100%" fo:font-size="13pt" fo:font-weight="bold" style:font-size-asian="13pt" style:font-weight-asian="bold" style:font-size-complex="13pt" style:font-weight-complex="bold"/>
    </style:style>
    <style:style style:name="P40" style:family="paragraph" style:parent-style-name="Text_20_body" style:list-style-name="L1">
      <style:paragraph-properties fo:margin-top="0in" fo:margin-bottom="0in" style:contextual-spacing="false" fo:text-align="start" style:justify-single-word="false" style:writing-mode="lr-tb"/>
    </style:style>
    <style:style style:name="P41" style:family="paragraph" style:parent-style-name="Text_20_body" style:list-style-name="L1">
      <style:paragraph-properties fo:text-align="start" style:justify-single-word="false" style:writing-mode="lr-tb"/>
    </style:style>
    <style:style style:name="P42" style:family="paragraph" style:parent-style-name="Text_20_body" style:list-style-name="L2">
      <style:paragraph-properties fo:margin-top="0in" fo:margin-bottom="0in" style:contextual-spacing="false" fo:text-align="start" style:justify-single-word="false" style:writing-mode="lr-tb"/>
    </style:style>
    <style:style style:name="P43" style:family="paragraph" style:parent-style-name="Text_20_body" style:list-style-name="L2">
      <style:paragraph-properties fo:text-align="start" style:justify-single-word="false" style:writing-mode="lr-tb"/>
    </style:style>
    <style:style style:name="P44" style:family="paragraph" style:parent-style-name="Text_20_body" style:list-style-name="L3">
      <style:paragraph-properties fo:margin-top="0in" fo:margin-bottom="0in" style:contextual-spacing="false" fo:text-align="start" style:justify-single-word="false" style:writing-mode="lr-tb"/>
    </style:style>
    <style:style style:name="P45" style:family="paragraph" style:parent-style-name="Text_20_body" style:list-style-name="L3">
      <style:paragraph-properties fo:text-align="start" style:justify-single-word="false" style:writing-mode="lr-tb"/>
    </style:style>
    <style:style style:name="P46" style:family="paragraph" style:parent-style-name="Text_20_body" style:list-style-name="L4">
      <style:paragraph-properties fo:margin-top="0in" fo:margin-bottom="0in" style:contextual-spacing="false" fo:text-align="start" style:justify-single-word="false" style:writing-mode="lr-tb"/>
    </style:style>
    <style:style style:name="P47" style:family="paragraph" style:parent-style-name="Text_20_body" style:list-style-name="L4">
      <style:paragraph-properties fo:text-align="start" style:justify-single-word="false" style:writing-mode="lr-tb"/>
    </style:style>
    <style:style style:name="P48" style:family="paragraph" style:parent-style-name="Text_20_body" style:list-style-name="L12">
      <style:paragraph-properties fo:text-align="start" style:justify-single-word="false" style:writing-mode="lr-tb"/>
    </style:style>
    <style:style style:name="P49" style:family="paragraph" style:parent-style-name="Text_20_body" style:list-style-name="L13">
      <style:paragraph-properties fo:text-align="start" style:justify-single-word="false" style:writing-mode="lr-tb"/>
    </style:style>
    <style:style style:name="P50" style:family="paragraph" style:parent-style-name="Text_20_body" style:list-style-name="L13">
      <style:paragraph-properties fo:margin-top="0in" fo:margin-bottom="0in" style:contextual-spacing="false" fo:text-align="start" style:justify-single-word="false" style:writing-mode="lr-tb"/>
    </style:style>
    <style:style style:name="P51" style:family="paragraph" style:parent-style-name="Text_20_body" style:list-style-name="L14">
      <style:paragraph-properties fo:margin-top="0in" fo:margin-bottom="0in" style:contextual-spacing="false" fo:text-align="start" style:justify-single-word="false" style:writing-mode="lr-tb"/>
    </style:style>
    <style:style style:name="P52" style:family="paragraph" style:parent-style-name="Text_20_body" style:list-style-name="L14">
      <style:paragraph-properties fo:text-align="start" style:justify-single-word="false" style:writing-mode="lr-tb"/>
    </style:style>
    <style:style style:name="P53" style:family="paragraph" style:parent-style-name="Text_20_body" style:list-style-name="L15">
      <style:paragraph-properties fo:margin-top="0in" fo:margin-bottom="0in" style:contextual-spacing="false" fo:text-align="start" style:justify-single-word="false" style:writing-mode="lr-tb"/>
    </style:style>
    <style:style style:name="P54" style:family="paragraph" style:parent-style-name="Text_20_body" style:list-style-name="L15">
      <style:paragraph-properties fo:text-align="start" style:justify-single-word="false" style:writing-mode="lr-tb"/>
    </style:style>
    <style:style style:name="P55" style:family="paragraph" style:parent-style-name="Text_20_body" style:list-style-name="L16">
      <style:paragraph-properties fo:margin-top="0in" fo:margin-bottom="0in" style:contextual-spacing="false" fo:text-align="start" style:justify-single-word="false" style:writing-mode="lr-tb"/>
    </style:style>
    <style:style style:name="P56" style:family="paragraph" style:parent-style-name="Text_20_body" style:list-style-name="L16">
      <style:paragraph-properties fo:text-align="start" style:justify-single-word="false" style:writing-mode="lr-tb"/>
    </style:style>
    <style:style style:name="P57" style:family="paragraph" style:parent-style-name="Text_20_body" style:list-style-name="L17">
      <style:paragraph-properties fo:text-align="start" style:justify-single-word="false" style:writing-mode="lr-tb"/>
    </style:style>
    <style:style style:name="P58" style:family="paragraph" style:parent-style-name="Text_20_body" style:list-style-name="L17">
      <style:paragraph-properties fo:margin-top="0in" fo:margin-bottom="0in" style:contextual-spacing="false" fo:text-align="start" style:justify-single-word="false" style:writing-mode="lr-tb"/>
    </style:style>
    <style:style style:name="P59" style:family="paragraph" style:parent-style-name="Text_20_body" style:list-style-name="L18">
      <style:paragraph-properties fo:margin-top="0in" fo:margin-bottom="0in" style:contextual-spacing="false" fo:text-align="start" style:justify-single-word="false" style:writing-mode="lr-tb"/>
    </style:style>
    <style:style style:name="P60" style:family="paragraph" style:parent-style-name="Text_20_body" style:list-style-name="L18">
      <style:paragraph-properties fo:text-align="start" style:justify-single-word="false" style:writing-mode="lr-tb"/>
    </style:style>
    <style:style style:name="P61" style:family="paragraph" style:parent-style-name="Text_20_body" style:list-style-name="L19">
      <style:paragraph-properties fo:margin-top="0in" fo:margin-bottom="0in" style:contextual-spacing="false" fo:text-align="start" style:justify-single-word="false" style:writing-mode="lr-tb"/>
    </style:style>
    <style:style style:name="P62" style:family="paragraph" style:parent-style-name="Text_20_body" style:list-style-name="L19">
      <style:paragraph-properties fo:text-align="start" style:justify-single-word="false" style:writing-mode="lr-tb"/>
    </style:style>
    <style:style style:name="P63" style:family="paragraph" style:parent-style-name="Text_20_body" style:list-style-name="L20">
      <style:paragraph-properties fo:margin-top="0in" fo:margin-bottom="0in" style:contextual-spacing="false" fo:text-align="start" style:justify-single-word="false" style:writing-mode="lr-tb"/>
    </style:style>
    <style:style style:name="P64" style:family="paragraph" style:parent-style-name="Text_20_body" style:list-style-name="L20">
      <style:paragraph-properties fo:text-align="start" style:justify-single-word="false" style:writing-mode="lr-tb"/>
    </style:style>
    <style:style style:name="P65" style:family="paragraph" style:parent-style-name="Text_20_body" style:list-style-name="L21">
      <style:paragraph-properties fo:margin-top="0in" fo:margin-bottom="0in" style:contextual-spacing="false" fo:text-align="start" style:justify-single-word="false" style:writing-mode="lr-tb"/>
    </style:style>
    <style:style style:name="P66" style:family="paragraph" style:parent-style-name="Text_20_body" style:list-style-name="L21">
      <style:paragraph-properties fo:text-align="start" style:justify-single-word="false" style:writing-mode="lr-tb"/>
    </style:style>
    <style:style style:name="P67" style:family="paragraph" style:parent-style-name="Text_20_body" style:list-style-name="L22">
      <style:paragraph-properties fo:margin-top="0in" fo:margin-bottom="0in" style:contextual-spacing="false" fo:text-align="start" style:justify-single-word="false" style:writing-mode="lr-tb"/>
    </style:style>
    <style:style style:name="P68" style:family="paragraph" style:parent-style-name="Text_20_body" style:list-style-name="L22">
      <style:paragraph-properties fo:text-align="start" style:justify-single-word="false" style:writing-mode="lr-tb"/>
    </style:style>
    <style:style style:name="P69" style:family="paragraph" style:parent-style-name="Text_20_body" style:list-style-name="L23">
      <style:paragraph-properties fo:margin-top="0in" fo:margin-bottom="0in" style:contextual-spacing="false" fo:text-align="start" style:justify-single-word="false" style:writing-mode="lr-tb"/>
    </style:style>
    <style:style style:name="P70" style:family="paragraph" style:parent-style-name="Text_20_body" style:list-style-name="L23">
      <style:paragraph-properties fo:text-align="start" style:justify-single-word="false" style:writing-mode="lr-tb"/>
    </style:style>
    <style:style style:name="P71" style:family="paragraph" style:parent-style-name="Text_20_body" style:list-style-name="L31">
      <style:paragraph-properties fo:margin-top="0in" fo:margin-bottom="0in" style:contextual-spacing="false" fo:text-align="start" style:justify-single-word="false" style:writing-mode="lr-tb"/>
    </style:style>
    <style:style style:name="P72" style:family="paragraph" style:parent-style-name="Text_20_body" style:list-style-name="L31">
      <style:paragraph-properties fo:text-align="start" style:justify-single-word="false" style:writing-mode="lr-tb"/>
    </style:style>
    <style:style style:name="P73" style:family="paragraph" style:parent-style-name="Text_20_body" style:list-style-name="L32">
      <style:paragraph-properties fo:text-align="start" style:justify-single-word="false" style:writing-mode="lr-tb"/>
    </style:style>
    <style:style style:name="P74" style:family="paragraph" style:parent-style-name="Text_20_body" style:list-style-name="L5"/>
    <style:style style:name="P75" style:family="paragraph" style:parent-style-name="Text_20_body" style:list-style-name="L5">
      <style:paragraph-properties fo:margin-top="0in" fo:margin-bottom="0in" style:contextual-spacing="false"/>
    </style:style>
    <style:style style:name="P76" style:family="paragraph" style:parent-style-name="Text_20_body" style:list-style-name="L6"/>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1"/>
    <style:style style:name="P80" style:family="paragraph" style:parent-style-name="Text_20_body" style:list-style-name="L24"/>
    <style:style style:name="P81" style:family="paragraph" style:parent-style-name="Text_20_body" style:list-style-name="L24">
      <style:paragraph-properties fo:margin-top="0in" fo:margin-bottom="0in" style:contextual-spacing="false"/>
    </style:style>
    <style:style style:name="P82" style:family="paragraph" style:parent-style-name="Text_20_body" style:list-style-name="L25"/>
    <style:style style:name="P83" style:family="paragraph" style:parent-style-name="Text_20_body" style:list-style-name="L25">
      <style:paragraph-properties fo:margin-top="0in" fo:margin-bottom="0in" style:contextual-spacing="false"/>
    </style:style>
    <style:style style:name="P84" style:family="paragraph" style:parent-style-name="Text_20_body" style:list-style-name="L26"/>
    <style:style style:name="P85" style:family="paragraph" style:parent-style-name="Text_20_body" style:list-style-name="L26">
      <style:paragraph-properties fo:margin-top="0in" fo:margin-bottom="0in" style:contextual-spacing="false"/>
    </style:style>
    <style:style style:name="P86" style:family="paragraph" style:parent-style-name="Text_20_body" style:list-style-name="L27"/>
    <style:style style:name="P87" style:family="paragraph" style:parent-style-name="Text_20_body" style:list-style-name="L27">
      <style:paragraph-properties fo:margin-top="0in" fo:margin-bottom="0in" style:contextual-spacing="false"/>
    </style:style>
    <style:style style:name="P88" style:family="paragraph" style:parent-style-name="Text_20_body" style:list-style-name="L28"/>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36">
      <style:paragraph-properties fo:margin-top="0in" fo:margin-bottom="0in" style:contextual-spacing="false"/>
    </style:style>
    <style:style style:name="P93" style:family="paragraph" style:parent-style-name="Text_20_body" style:list-style-name="L37"/>
    <style:style style:name="P94" style:family="paragraph" style:parent-style-name="Text_20_body" style:list-style-name="L37">
      <style:paragraph-properties fo:margin-top="0in" fo:margin-bottom="0in" style:contextual-spacing="false"/>
    </style:style>
    <style:style style:name="T1" style:family="text">
      <style:text-properties officeooo:rsid="0008a9da"/>
    </style:style>
    <style:style style:name="T2" style:family="text">
      <style:text-properties fo:color="#ff0000" loext:opacity="100%" fo:font-size="15pt" fo:font-weight="bold" style:font-size-asian="15pt" style:font-weight-asian="bold" style:font-size-complex="15pt" style:font-weight-complex="bold"/>
    </style:style>
    <style:style style:name="T3" style:family="text">
      <style:text-properties fo:color="#ff0000" loext:opacity="100%" fo:font-size="15pt" fo:font-weight="bold" officeooo:rsid="000a6ac0" style:font-size-asian="15pt" style:font-weight-asian="bold" style:font-size-complex="15pt" style:font-weight-complex="bold"/>
    </style:style>
    <style:style style:name="T4" style:family="text">
      <style:text-properties fo:color="#ff0000" loext:opacity="100%" fo:font-size="13pt" fo:font-weight="bold" style:font-size-asian="13pt" style:font-weight-asian="bold" style:font-size-complex="13pt" style:font-weight-complex="bold"/>
    </style:style>
    <style:style style:name="T5" style:family="text">
      <style:text-properties officeooo:rsid="000a6ac0"/>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lablador (LLama3)</text:p>
      <text:p text:style-name="P18">What is load imbalance?</text:p>
      <text:p text:style-name="P2">Load imbalance refers to a situation in which the workload of a computer system or network is not evenly distributed, leading to some parts being underutilized while others are overwhelmed. This can cause inefficiencies, reduced performance, and increased latency. In distributed systems, load imbalance can occur due to various factors such as differences in processing power, network bandwidth, or the amount of data being processed by each node. Addressing load imbalance is crucial for optimizing system performance, ensuring fairness, and preventing bottlenecks.</text:p>
      <text:p text:style-name="P19">What is load imbalance in parallel processing/computing?</text:p>
      <text:p text:style-name="P2">In parallel processing or computing, load imbalance occurs when the computational workload is not evenly distributed among the processing units, such as CPUs, GPUs, or nodes in a cluster. This imbalance can happen due to several reasons, including: differences in processing power of the computing units, variability in the size or complexity of tasks assigned to each unit, or inefficient scheduling algorithms. As a result, some processing units may finish their tasks much earlier than others, leading to idle time, while others may be overloaded, causing delays. Load balancing techniques are employed to redistribute the workload more evenly, thereby improving overall system efficiency, reducing idle time, and enhancing scalability.</text:p>
      <text:p text:style-name="P19">Do you know how call tree is organized in cubegui (the scalasca cubegui software)?</text:p>
      <text:p text:style-name="P2">A very specific question indeed! Unfortunately, I don't have detailed information on the internal organization of the call tree in CubeGUI, part of the Scalasca toolset. Scalasca is a performance analysis toolset for parallel programs, and CubeGUI is its graphical user interface. The call tree in such tools typically represents the hierarchical structure of function calls within a program, helping in the analysis of performance and identification of bottlenecks. For the most accurate and detailed explanation, I recommend consulting the official Scalasca documentation or reaching out to their support community. They would be able to provide a precise description of how the call tree is organized within CubeGUI.</text:p>
      <text:section text:style-name="Sect1" text:name="input_box">
        <text:p text:style-name="P14">Textbox </text:p>
      </text:section>
      <text:p text:style-name="Standard"/>
      <text:p text:style-name="P16">Blablador (GPT-OSS-120b - an open model released by OpenAI in August 2025)</text:p>
      <text:p text:style-name="Standard"/>
      <text:p text:style-name="Standard"/>
      <text:p text:style-name="P19">What is load imbalance in parallel processing/computing?</text:p>
      <text:p text:style-name="P2"><text:span text:style-name="Strong_20_Emphasis">Load imbalance</text:span> (sometimes called <text:span text:style-name="Emphasis">work imbalance</text:span> or <text:span text:style-name="Emphasis">uneven workload distribution</text:span>) is a condition that occurs in parallel programs when the amount of work assigned to the different processing elements (threads, cores, CPUs, GPUs, nodes, etc.) is not the same. </text:p>
      <text:p text:style-name="P12">Because parallel execution relies on many workers progressing together, any worker that finishes its portion of the job early must sit idle while the slower (or more heavily‑loaded) workers finish. The <text:soft-page-break/>overall execution time is therefore dictated by the <text:span text:style-name="Emphasis">slowest</text:span> or <text:span text:style-name="Emphasis">most loaded</text:span> worker, not by the average amount of work. This wasted time is what we call <text:span text:style-name="Strong_20_Emphasis">load imbalance</text:span>.</text:p>
      <text:p text:style-name="P9"/>
      <text:h text:style-name="P6" text:outline-level="2">1. Why load imbalance matters</text:h>
      <table:table table:name="Table1" table:style-name="Table1">
        <table:table-column table:style-name="Table1.A"/>
        <table:table-column table:style-name="Table1.B"/>
        <table:table-header-rows>
          <table:table-row>
            <table:table-cell table:style-name="Table1.A1" office:value-type="string">
              <text:p text:style-name="Table_20_Heading">Symptom</text:p>
            </table:table-cell>
            <table:table-cell table:style-name="Table1.A1" office:value-type="string">
              <text:p text:style-name="Table_20_Heading">Consequence</text:p>
            </table:table-cell>
          </table:table-row>
        </table:table-header-rows>
        <table:table-row>
          <table:table-cell table:style-name="Table1.A1" office:value-type="string">
            <text:p text:style-name="Table_20_Contents">Some threads finish early and wait at a barrier or synchronisation point</text:p>
          </table:table-cell>
          <table:table-cell table:style-name="Table1.A1" office:value-type="string">
            <text:p text:style-name="Table_20_Contents"><text:span text:style-name="Strong_20_Emphasis">Reduced parallel efficiency</text:span> – the speed‑up falls far short of the ideal linear speed‑up.</text:p>
          </table:table-cell>
        </table:table-row>
        <table:table-row>
          <table:table-cell table:style-name="Table1.A1" office:value-type="string">
            <text:p text:style-name="Table_20_Contents">One node holds a “hot spot” of data that many tasks need</text:p>
          </table:table-cell>
          <table:table-cell table:style-name="Table1.A1" office:value-type="string">
            <text:p text:style-name="Table_20_Contents"><text:span text:style-name="Strong_20_Emphasis">Increased communication / contention</text:span>, leading to higher latency and lower throughput.</text:p>
          </table:table-cell>
        </table:table-row>
        <table:table-row>
          <table:table-cell table:style-name="Table1.A1" office:value-type="string">
            <text:p text:style-name="Table_20_Contents">Varying execution times across iterations</text:p>
          </table:table-cell>
          <table:table-cell table:style-name="Table1.A1" office:value-type="string">
            <text:p text:style-name="Table_20_Contents"><text:span text:style-name="Strong_20_Emphasis">Unpredictable performance</text:span>, making it hard to tune or provision resources.</text:p>
          </table:table-cell>
        </table:table-row>
      </table:table>
      <text:p text:style-name="P12">In the extreme, a program with many idle workers may run <text:span text:style-name="Emphasis">slower</text:span> than its sequential counterpart because of overheads (synchronisation, scheduling, memory traffic, etc.).</text:p>
      <text:p text:style-name="P9"/>
      <text:h text:style-name="P6" text:outline-level="2">2. Typical causes of load imbalanc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ategory</text:p>
            </table:table-cell>
            <table:table-cell table:style-name="Table2.A1" office:value-type="string">
              <text:p text:style-name="Table_20_Heading">Typical cause</text:p>
            </table:table-cell>
            <table:table-cell table:style-name="Table2.A1" office:value-type="string">
              <text:p text:style-name="Table_20_Heading">Example</text:p>
            </table:table-cell>
          </table:table-row>
        </table:table-header-rows>
        <table:table-row>
          <table:table-cell table:style-name="Table2.A1" office:value-type="string">
            <text:p text:style-name="Table_20_Contents"><text:span text:style-name="Strong_20_Emphasis">Algorithmic heterogeneity</text:span></text:p>
          </table:table-cell>
          <table:table-cell table:style-name="Table2.A1" office:value-type="string">
            <text:p text:style-name="Table_20_Contents">Different branches of the algorithm require different amounts of work.</text:p>
          </table:table-cell>
          <table:table-cell table:style-name="Table2.A1" office:value-type="string">
            <text:p text:style-name="Table_20_Contents">In a recursive quick‑sort, sub‑arrays of very different sizes are processed by different threads.</text:p>
          </table:table-cell>
        </table:table-row>
        <table:table-row>
          <table:table-cell table:style-name="Table2.A1" office:value-type="string">
            <text:p text:style-name="Table_20_Contents"><text:span text:style-name="Strong_20_Emphasis">Data‑dependent work</text:span></text:p>
          </table:table-cell>
          <table:table-cell table:style-name="Table2.A1" office:value-type="string">
            <text:p text:style-name="Table_20_Contents">Work per data element varies with the input values.</text:p>
          </table:table-cell>
          <table:table-cell table:style-name="Table2.A1" office:value-type="string">
            <text:p text:style-name="Table_20_Contents">In a particle simulation, dense regions need many interaction calculations while sparse regions need few.</text:p>
          </table:table-cell>
        </table:table-row>
        <table:table-row>
          <table:table-cell table:style-name="Table2.A1" office:value-type="string">
            <text:p text:style-name="Table_20_Contents"><text:span text:style-name="Strong_20_Emphasis">Static partitioning with uneven data</text:span></text:p>
          </table:table-cell>
          <table:table-cell table:style-name="Table2.A1" office:value-type="string">
            <text:p text:style-name="Table_20_Contents">The data is split once (e.g., by index range) assuming uniform cost, but the cost is non‑uniform.</text:p>
          </table:table-cell>
          <table:table-cell table:style-name="Table2.A1" office:value-type="string">
            <text:p text:style-name="Table_20_Contents">Splitting a graph by vertex ID, but some vertices have many edges (high degree) and others have few.</text:p>
          </table:table-cell>
        </table:table-row>
        <table:table-row>
          <table:table-cell table:style-name="Table2.A1" office:value-type="string">
            <text:p text:style-name="Table_20_Contents"><text:span text:style-name="Strong_20_Emphasis">Dynamic system effects</text:span></text:p>
          </table:table-cell>
          <table:table-cell table:style-name="Table2.A1" office:value-type="string">
            <text:p text:style-name="Table_20_Contents">OS scheduling, NUMA effects, or hardware heterogeneity (different core speeds, GPU vs CPU).</text:p>
          </table:table-cell>
          <table:table-cell table:style-name="Table2.A1" office:value-type="string">
            <text:p text:style-name="Table_20_Contents">A mixed‑core system where “big” cores finish work faster than “little” cores.</text:p>
          </table:table-cell>
        </table:table-row>
        <table:table-row>
          <table:table-cell table:style-name="Table2.A1" office:value-type="string">
            <text:p text:style-name="Table_20_Contents"><text:span text:style-name="Strong_20_Emphasis">External interference</text:span></text:p>
          </table:table-cell>
          <table:table-cell table:style-name="Table2.A1" office:value-type="string">
            <text:p text:style-name="Table_20_Contents">Other processes, I/O, or network traffic slow down some workers.</text:p>
          </table:table-cell>
          <table:table-cell table:style-name="Table2.A1" office:value-type="string">
            <text:p text:style-name="Table_20_Contents">On a shared cluster node, one core is throttled by a heavy background job.</text:p>
          </table:table-cell>
        </table:table-row>
        <table:table-row>
          <table:table-cell table:style-name="Table2.A1" office:value-type="string">
            <text:p text:style-name="Table_20_Contents"><text:span text:style-name="Strong_20_Emphasis">Imprecise granularity</text:span></text:p>
          </table:table-cell>
          <table:table-cell table:style-name="Table2.A1" office:value-type="string">
            <text:p text:style-name="Table_20_Contents">Tasks are too coarse (few large tasks) or too fine (overhead dominates).</text:p>
          </table:table-cell>
          <table:table-cell table:style-name="Table2.A1" office:value-type="string">
            <text:p text:style-name="Table_20_Contents">Assigning one huge matrix block to a single thread while others get tiny blocks.</text:p>
          </table:table-cell>
        </table:table-row>
      </table:table>
      <text:p text:style-name="P9"/>
      <text:h text:style-name="P6" text:outline-level="2">3. Quantifying load imbalance</text:h>
      <text:h text:style-name="P7" text:outline-level="3">3.1 Simple metrics</text:h>
      <text:p text:style-name="P12">Let (T_i) be the execution time of worker <text:span text:style-name="Emphasis">i</text:span> (excluding idle time waiting at barriers). </text:p>
      <text:list text:style-name="L1">
        <text:list-item>
          <text:p text:style-name="P40"><text:span text:style-name="Strong_20_Emphasis">Mean time:</text:span> (\bar{T} = \frac{1}{P}\sum_{i=1}^{P} T_i) (where <text:span text:style-name="Emphasis">P</text:span> is the number of workers). </text:p>
        </text:list-item>
        <text:list-item>
          <text:p text:style-name="P41"><text:span text:style-name="Strong_20_Emphasis">Maximum time:</text:span> (T_{\max} = \max_i T_i). </text:p>
        </text:list-item>
      </text:list>
      <text:p text:style-name="P12"><text:soft-page-break/>The <text:span text:style-name="Strong_20_Emphasis">load‑imbalance factor (LIF)</text:span> is often defined as </text:p>
      <text:p text:style-name="P12">[<text:line-break/>\text{LIF} = \frac{T_{\max}}{\bar{T}} \ge 1.<text:line-break/>]</text:p>
      <text:list text:style-name="L2">
        <text:list-item>
          <text:p text:style-name="P42">LIF = 1 → perfect balance. </text:p>
        </text:list-item>
        <text:list-item>
          <text:p text:style-name="P43">LIF = 1.2 → the slowest worker does 20 % more work than average. </text:p>
        </text:list-item>
      </text:list>
      <text:h text:style-name="P7" text:outline-level="3">3.2 More detailed statistic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tatistic</text:p>
            </table:table-cell>
            <table:table-cell table:style-name="Table3.A1" office:value-type="string">
              <text:p text:style-name="Table_20_Heading">Formula</text:p>
            </table:table-cell>
            <table:table-cell table:style-name="Table3.A1" office:value-type="string">
              <text:p text:style-name="Table_20_Heading">What it tells you</text:p>
            </table:table-cell>
          </table:table-row>
        </table:table-header-rows>
        <table:table-row>
          <table:table-cell table:style-name="Table3.A1" office:value-type="string">
            <text:p text:style-name="Table_20_Contents"><text:span text:style-name="Strong_20_Emphasis">Standard deviation</text:span> (\sigma_T = \sqrt{\frac{1}{P}\sum (T_i-\bar{T})^2})</text:p>
          </table:table-cell>
          <table:table-cell table:style-name="Table3.A1" office:value-type="string">
            <text:p text:style-name="Table_20_Contents">Spread of execution times.</text:p>
          </table:table-cell>
          <table:table-cell table:style-name="Table3.A1" office:value-type="string">
            <text:p text:style-name="P25"/>
          </table:table-cell>
        </table:table-row>
        <table:table-row>
          <table:table-cell table:style-name="Table3.A1" office:value-type="string">
            <text:p text:style-name="Table_20_Contents"><text:span text:style-name="Strong_20_Emphasis">Coefficient of variation</text:span> (CV = \sigma_T / \bar{T})</text:p>
          </table:table-cell>
          <table:table-cell table:style-name="Table3.A1" office:value-type="string">
            <text:p text:style-name="Table_20_Contents">Normalised spread (dimensionless).</text:p>
          </table:table-cell>
          <table:table-cell table:style-name="Table3.A1" office:value-type="string">
            <text:p text:style-name="P25"/>
          </table:table-cell>
        </table:table-row>
        <table:table-row>
          <table:table-cell table:style-name="Table3.A1" office:value-type="string">
            <text:p text:style-name="Table_20_Contents"><text:span text:style-name="Strong_20_Emphasis">Idle time ratio</text:span> (\frac{\sum (T_{\max} - T_i)}{P \cdot T_{\max}})</text:p>
          </table:table-cell>
          <table:table-cell table:style-name="Table3.A1" office:value-type="string">
            <text:p text:style-name="Table_20_Contents">Fraction of total compute cycles spent idle.</text:p>
          </table:table-cell>
          <table:table-cell table:style-name="Table3.A1" office:value-type="string">
            <text:p text:style-name="P25"/>
          </table:table-cell>
        </table:table-row>
      </table:table>
      <text:p text:style-name="P12">Many profiling tools (e.g., Intel VTune, NVIDIA Nsight, OpenMP‑Tools, HPCToolkit) automatically compute these numbers for you.</text:p>
      <text:p text:style-name="P9"/>
      <text:h text:style-name="P6" text:outline-level="2">4. Detecting load imbalance in practic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chnique</text:p>
            </table:table-cell>
            <table:table-cell table:style-name="Table4.A1" office:value-type="string">
              <text:p text:style-name="Table_20_Heading">How it works</text:p>
            </table:table-cell>
            <table:table-cell table:style-name="Table4.A1" office:value-type="string">
              <text:p text:style-name="Table_20_Heading">Typical tools</text:p>
            </table:table-cell>
          </table:table-row>
        </table:table-header-rows>
        <table:table-row>
          <table:table-cell table:style-name="Table4.A1" office:value-type="string">
            <text:p text:style-name="Table_20_Contents"><text:span text:style-name="Strong_20_Emphasis">Barrier profiling</text:span></text:p>
          </table:table-cell>
          <table:table-cell table:style-name="Table4.A1" office:value-type="string">
            <text:p text:style-name="Table_20_Contents">Measure the time each thread spends waiting at a barrier. Long wait times indicate imbalance.</text:p>
          </table:table-cell>
          <table:table-cell table:style-name="Table4.A1" office:value-type="string">
            <text:p text:style-name="Table_20_Contents">OpenMP <text:span text:style-name="Source_20_Text">omp_get_wtime</text:span>, MPI <text:span text:style-name="Source_20_Text">MPI_Wtime</text:span>, Intel Trace Analyzer.</text:p>
          </table:table-cell>
        </table:table-row>
        <table:table-row>
          <table:table-cell table:style-name="Table4.A1" office:value-type="string">
            <text:p text:style-name="Table_20_Contents"><text:span text:style-name="Strong_20_Emphasis">Per‑thread counters</text:span></text:p>
          </table:table-cell>
          <table:table-cell table:style-name="Table4.A1" office:value-type="string">
            <text:p text:style-name="Table_20_Contents">Instruments the code to count iterations, floating‑point ops, memory accesses per thread.</text:p>
          </table:table-cell>
          <table:table-cell table:style-name="Table4.A1" office:value-type="string">
            <text:p text:style-name="Table_20_Contents">PAPI, perf, <text:span text:style-name="Source_20_Text">__builtin_popcount</text:span> etc.</text:p>
          </table:table-cell>
        </table:table-row>
        <table:table-row>
          <table:table-cell table:style-name="Table4.A1" office:value-type="string">
            <text:p text:style-name="Table_20_Contents"><text:span text:style-name="Strong_20_Emphasis">Task‑graph visualisation</text:span></text:p>
          </table:table-cell>
          <table:table-cell table:style-name="Table4.A1" office:value-type="string">
            <text:p text:style-name="Table_20_Contents">Shows the critical path and idle gaps.</text:p>
          </table:table-cell>
          <table:table-cell table:style-name="Table4.A1" office:value-type="string">
            <text:p text:style-name="Table_20_Contents">DAG visualisers (e.g., Paraver, TAU).</text:p>
          </table:table-cell>
        </table:table-row>
        <table:table-row>
          <table:table-cell table:style-name="Table4.A1" office:value-type="string">
            <text:p text:style-name="Table_20_Contents"><text:span text:style-name="Strong_20_Emphasis">Hardware performance counters</text:span></text:p>
          </table:table-cell>
          <table:table-cell table:style-name="Table4.A1" office:value-type="string">
            <text:p text:style-name="Table_20_Contents">Look for low utilization (e.g., low IPC) on some cores while others are busy.</text:p>
          </table:table-cell>
          <table:table-cell table:style-name="Table4.A1" office:value-type="string">
            <text:p text:style-name="Table_20_Contents">Linux <text:span text:style-name="Source_20_Text">perf</text:span>, AMD uProf, Intel PCM.</text:p>
          </table:table-cell>
        </table:table-row>
        <table:table-row>
          <table:table-cell table:style-name="Table4.A1" office:value-type="string">
            <text:p text:style-name="Table_20_Contents"><text:span text:style-name="Strong_20_Emphasis">Dynamic runtime statistics</text:span></text:p>
          </table:table-cell>
          <table:table-cell table:style-name="Table4.A1" office:value-type="string">
            <text:p text:style-name="Table_20_Contents">Some runtimes (e.g., Cilk, TBB, OpenMP 5.0 tasking) expose <text:span text:style-name="Emphasis">load‑balance</text:span> statistics.</text:p>
          </table:table-cell>
          <table:table-cell table:style-name="Table4.A1" office:value-type="string">
            <text:p text:style-name="Table_20_Contents">TBB’s <text:span text:style-name="Source_20_Text">task_arena::observe</text:span>, OpenMP <text:span text:style-name="Source_20_Text">omp_get_num_threads</text:span> + <text:span text:style-name="Source_20_Text">omp_get_thread_num</text:span>.</text:p>
          </table:table-cell>
        </table:table-row>
      </table:table>
      <text:p text:style-name="P9"/>
      <text:h text:style-name="P6" text:outline-level="2">5. Strategies to mitigate load imbalance</text:h>
      <text:h text:style-name="P7" text:outline-level="3">5.1 Better <text:span text:style-name="Emphasis">static</text:span> partitioning</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chnique</text:p>
            </table:table-cell>
            <table:table-cell table:style-name="Table5.A1" office:value-type="string">
              <text:p text:style-name="Table_20_Heading">When it helps</text:p>
            </table:table-cell>
            <table:table-cell table:style-name="Table5.A1" office:value-type="string">
              <text:p text:style-name="Table_20_Heading">How to apply</text:p>
            </table:table-cell>
          </table:table-row>
        </table:table-header-rows>
        <table:table-row>
          <table:table-cell table:style-name="Table5.A1" office:value-type="string">
            <text:p text:style-name="Table_20_Contents"><text:span text:style-name="Strong_20_Emphasis">Domain decomposition </text:span><text:soft-page-break/><text:span text:style-name="Strong_20_Emphasis">aware of cost</text:span></text:p>
          </table:table-cell>
          <table:table-cell table:style-name="Table5.A1" office:value-type="string">
            <text:p text:style-name="Table_20_Contents">Cost can be predicted from data (e.g., number of <text:soft-page-break/>non‑zeros per row).</text:p>
          </table:table-cell>
          <table:table-cell table:style-name="Table5.A1" office:value-type="string">
            <text:p text:style-name="Table_20_Contents">Compute a <text:span text:style-name="Emphasis">weight</text:span> per data chunk and partition so that total weight per chunk is equal (e.g., <text:soft-page-break/>using METIS, Scotch, Zoltan).</text:p>
          </table:table-cell>
        </table:table-row>
        <table:table-row>
          <table:table-cell table:style-name="Table5.A1" office:value-type="string">
            <text:p text:style-name="Table_20_Contents"><text:span text:style-name="Strong_20_Emphasis">Cyclic or block‑cyclic distribution</text:span></text:p>
          </table:table-cell>
          <table:table-cell table:style-name="Table5.A1" office:value-type="string">
            <text:p text:style-name="Table_20_Contents">Work varies smoothly but unpredictably across indices.</text:p>
          </table:table-cell>
          <table:table-cell table:style-name="Table5.A1" office:value-type="string">
            <text:p text:style-name="Table_20_Contents">Instead of giving each thread a contiguous block, interleave indices (e.g., round‑robin).</text:p>
          </table:table-cell>
        </table:table-row>
        <table:table-row>
          <table:table-cell table:style-name="Table5.A1" office:value-type="string">
            <text:p text:style-name="Table_20_Contents"><text:span text:style-name="Strong_20_Emphasis">Space‑filling curves</text:span></text:p>
          </table:table-cell>
          <table:table-cell table:style-name="Table5.A1" office:value-type="string">
            <text:p text:style-name="Table_20_Contents">For irregular meshes or point clouds.</text:p>
          </table:table-cell>
          <table:table-cell table:style-name="Table5.A1" office:value-type="string">
            <text:p text:style-name="Table_20_Contents">Map multidimensional data to 1‑D using Hilbert or Morton curves and then split evenly.</text:p>
          </table:table-cell>
        </table:table-row>
      </table:table>
      <text:h text:style-name="P7" text:outline-level="3">5.2 Dynamic load‑balancing (work stealing, task pool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Model</text:p>
            </table:table-cell>
            <table:table-cell table:style-name="Table6.A1" office:value-type="string">
              <text:p text:style-name="Table_20_Heading">Key idea</text:p>
            </table:table-cell>
            <table:table-cell table:style-name="Table6.A1" office:value-type="string">
              <text:p text:style-name="Table_20_Heading">Typical APIs</text:p>
            </table:table-cell>
          </table:table-row>
        </table:table-header-rows>
        <table:table-row>
          <table:table-cell table:style-name="Table6.A1" office:value-type="string">
            <text:p text:style-name="Table_20_Contents"><text:span text:style-name="Strong_20_Emphasis">Task‑based runtimes</text:span></text:p>
          </table:table-cell>
          <table:table-cell table:style-name="Table6.A1" office:value-type="string">
            <text:p text:style-name="Table_20_Contents">Workers pull tasks from a shared queue; idle workers automatically get more work.</text:p>
          </table:table-cell>
          <table:table-cell table:style-name="Table6.A1" office:value-type="string">
            <text:p text:style-name="Table_20_Contents">Intel TBB, OpenMP tasks, Cilk Plus, HPX, StarPU, Kokkos <text:span text:style-name="Source_20_Text">parallel_for</text:span> with <text:span text:style-name="Source_20_Text">dynamic</text:span> policy.</text:p>
          </table:table-cell>
        </table:table-row>
        <table:table-row>
          <table:table-cell table:style-name="Table6.A1" office:value-type="string">
            <text:p text:style-name="Table_20_Contents"><text:span text:style-name="Strong_20_Emphasis">Work stealing</text:span></text:p>
          </table:table-cell>
          <table:table-cell table:style-name="Table6.A1" office:value-type="string">
            <text:p text:style-name="Table_20_Contents">Each worker has a private deque; when empty, it steals half of another’s deque.</text:p>
          </table:table-cell>
          <table:table-cell table:style-name="Table6.A1" office:value-type="string">
            <text:p text:style-name="Table_20_Contents">Cilk, TBB, OpenMP 5.0 <text:span text:style-name="Source_20_Text">taskloop</text:span> with <text:span text:style-name="Source_20_Text">schedule(dynamic,1)</text:span>.</text:p>
          </table:table-cell>
        </table:table-row>
        <table:table-row>
          <table:table-cell table:style-name="Table6.A1" office:value-type="string">
            <text:p text:style-name="Table_20_Contents"><text:span text:style-name="Strong_20_Emphasis">Self‑scheduling loops</text:span></text:p>
          </table:table-cell>
          <table:table-cell table:style-name="Table6.A1" office:value-type="string">
            <text:p text:style-name="Table_20_Contents">Loop iterations are assigned in chunks at runtime, often with decreasing chunk size.</text:p>
          </table:table-cell>
          <table:table-cell table:style-name="Table6.A1" office:value-type="string">
            <text:p text:style-name="Table_20_Contents">OpenMP <text:span text:style-name="Source_20_Text">schedule(dynamic,chunk)</text:span>, MPI + master/worker, OpenACC <text:span text:style-name="Source_20_Text">gang</text:span>/<text:span text:style-name="Source_20_Text">worker</text:span> dynamic.</text:p>
          </table:table-cell>
        </table:table-row>
        <table:table-row>
          <table:table-cell table:style-name="Table6.A1" office:value-type="string">
            <text:p text:style-name="Table_20_Contents"><text:span text:style-name="Strong_20_Emphasis">Adaptive granularity</text:span></text:p>
          </table:table-cell>
          <table:table-cell table:style-name="Table6.A1" office:value-type="string">
            <text:p text:style-name="Table_20_Contents">Chunk size changes based on observed execution times.</text:p>
          </table:table-cell>
          <table:table-cell table:style-name="Table6.A1" office:value-type="string">
            <text:p text:style-name="Table_20_Contents">Guided schedule (<text:span text:style-name="Source_20_Text">schedule(guided)</text:span>), Adaptive task granularity in TBB (<text:span text:style-name="Source_20_Text">tbb::task_group_context</text:span>).</text:p>
          </table:table-cell>
        </table:table-row>
      </table:table>
      <text:h text:style-name="P7" text:outline-level="3">5.3 Hybrid static‑dynamic approaches</text:h>
      <text:list text:style-name="L3">
        <text:list-item>
          <text:p text:style-name="P44"><text:span text:style-name="Strong_20_Emphasis">Static partition for the bulk + dynamic for the tail</text:span>: Allocate most of the work evenly, but keep a small “work pool” for leftovers that can be grabbed dynamically. </text:p>
        </text:list-item>
        <text:list-item>
          <text:p text:style-name="P45"><text:span text:style-name="Strong_20_Emphasis">Two‑level decomposition</text:span>: First split data across nodes (static, coarse), then let each node dynamically balance among its cores. </text:p>
        </text:list-item>
      </text:list>
      <text:h text:style-name="P7" text:outline-level="3">5.4 Algorithmic redesign</text:h>
      <text:list text:style-name="L4">
        <text:list-item>
          <text:p text:style-name="P46"><text:span text:style-name="Strong_20_Emphasis">Reduce data‑dependent branching</text:span>: Use algorithms whose cost per datum is more uniform (e.g., replace depth‑first recursion by breadth‑first or iterative versions). </text:p>
        </text:list-item>
        <text:list-item>
          <text:p text:style-name="P46"><text:span text:style-name="Strong_20_Emphasis">Use approximations</text:span>: When exact work is costly only for a few elements, replace them with cheaper approximations that can be refined later. </text:p>
        </text:list-item>
        <text:list-item>
          <text:p text:style-name="P47"><text:span text:style-name="Strong_20_Emphasis">Load‑balanced data structures</text:span>: For graph problems, use <text:span text:style-name="Emphasis">vertex‑cut</text:span> or <text:span text:style-name="Emphasis">edge‑cut</text:span> partitions that balance edge counts rather than vertex counts. </text:p>
        </text:list-item>
      </text:list>
      <text:h text:style-name="P7" text:outline-level="3">5.5 System‑level tricks</text:h>
      <table:table table:name="Table7" table:style-name="Table7">
        <table:table-column table:style-name="Table7.A"/>
        <table:table-column table:style-name="Table7.B"/>
        <table:table-header-rows>
          <table:table-row>
            <table:table-cell table:style-name="Table7.A1" office:value-type="string">
              <text:p text:style-name="Table_20_Heading">Trick</text:p>
            </table:table-cell>
            <table:table-cell table:style-name="Table7.A1" office:value-type="string">
              <text:p text:style-name="Table_20_Heading">Effect</text:p>
            </table:table-cell>
          </table:table-row>
        </table:table-header-rows>
        <table:table-row>
          <table:table-cell table:style-name="Table7.A1" office:value-type="string">
            <text:p text:style-name="Table_20_Contents"><text:span text:style-name="Strong_20_Emphasis">Pin threads to cores (affinity)</text:span></text:p>
          </table:table-cell>
          <table:table-cell table:style-name="Table7.A1" office:value-type="string">
            <text:p text:style-name="Table_20_Contents">Avoid OS migration that can cause uneven cache state.</text:p>
          </table:table-cell>
        </table:table-row>
        <table:table-row>
          <table:table-cell table:style-name="Table7.A1" office:value-type="string">
            <text:p text:style-name="Table_20_Contents"><text:span text:style-name="Strong_20_Emphasis">NUMA‑aware allocation</text:span></text:p>
          </table:table-cell>
          <table:table-cell table:style-name="Table7.A1" office:value-type="string">
            <text:p text:style-name="Table_20_Contents">Allocate memory local to the thread that will use it, preventing remote‑memory latency that makes a thread appear slower.</text:p>
          </table:table-cell>
        </table:table-row>
        <table:table-row>
          <table:table-cell table:style-name="Table7.A1" office:value-type="string">
            <text:p text:style-name="Table_20_Contents"><text:span text:style-name="Strong_20_Emphasis">Power‑management control</text:span></text:p>
          </table:table-cell>
          <table:table-cell table:style-name="Table7.A1" office:value-type="string">
            <text:p text:style-name="Table_20_Contents">Disable aggressive frequency scaling if it creates “big‑slow” vs “little‑fast” cores.</text:p>
          </table:table-cell>
        </table:table-row>
        <table:table-row>
          <table:table-cell table:style-name="Table7.A1" office:value-type="string">
            <text:p text:style-name="Table_20_Contents"><text:span text:style-name="Strong_20_Emphasis">Isolate dedicated cores</text:span></text:p>
          </table:table-cell>
          <table:table-cell table:style-name="Table7.A1" office:value-type="string">
            <text:p text:style-name="Table_20_Contents">Reserve a set of cores for the parallel job, preventing interference from <text:soft-page-break/>other processes.</text:p>
          </table:table-cell>
        </table:table-row>
      </table:table>
      <text:p text:style-name="P9"/>
      <text:h text:style-name="P6" text:outline-level="2">6. A concrete example</text:h>
      <text:h text:style-name="P7" text:outline-level="3">Problem: Parallel matrix‑vector multiplication (SpMV) on a sparse matrix</text:h>
      <text:p text:style-name="Preformatted_20_Text"><text:span text:style-name="Source_20_Text">#pragma omp parallel for schedule(static)</text:span></text:p>
      <text:p text:style-name="Preformatted_20_Text"><text:span text:style-name="Source_20_Text">for (int i = 0; i &lt; N; ++i) {</text:span></text:p>
      <text:p text:style-name="Preformatted_20_Text"><text:span text:style-name="Source_20_Text"><text:s text:c="4"/>double sum = 0.0;</text:span></text:p>
      <text:p text:style-name="Preformatted_20_Text"><text:span text:style-name="Source_20_Text"><text:s text:c="4"/>for (int k = row_ptr[i]; k &lt; row_ptr[i+1]; ++k)</text:span></text:p>
      <text:p text:style-name="Preformatted_20_Text"><text:span text:style-name="Source_20_Text"><text:s text:c="8"/>sum += val[k] * x[col_ind[k]];</text:span></text:p>
      <text:p text:style-name="Preformatted_20_Text"><text:span text:style-name="Source_20_Text"><text:s text:c="4"/>y[i] = sum;</text:span></text:p>
      <text:p text:style-name="P15"><text:span text:style-name="Source_20_Text">}</text:span></text:p>
      <text:p text:style-name="Text_20_body"><text:span text:style-name="Strong_20_Emphasis">What can go wrong?</text:span><text:line-break/>If the matrix rows have highly variable numbers of non‑zeros, <text:span text:style-name="Source_20_Text">schedule(static)</text:span> gives each thread a contiguous block of rows with <text:span text:style-name="Emphasis">different</text:span> amounts of work. Threads handling rows with many non‑zeros become the bottleneck.</text:p>
      <text:p text:style-name="Text_20_body"><text:span text:style-name="Strong_20_Emphasis">Detecting imbalance:</text:span> </text:p>
      <text:list text:style-name="L5">
        <text:list-item>
          <text:p text:style-name="P75">Measure per‑thread time with <text:span text:style-name="Source_20_Text">omp_get_wtime</text:span>. </text:p>
        </text:list-item>
        <text:list-item>
          <text:p text:style-name="P75">Compute LIF = <text:span text:style-name="Source_20_Text">max(thread_time)/mean(thread_time)</text:span>. </text:p>
        </text:list-item>
        <text:list-item>
          <text:p text:style-name="P74">If LIF &gt; 1.2, consider it imbalanced. </text:p>
        </text:list-item>
      </text:list>
      <text:p text:style-name="Text_20_body"><text:span text:style-name="Strong_20_Emphasis">Fixes:</text:span></text:p>
      <text:list text:style-name="L6">
        <text:list-item>
          <text:p text:style-name="P76"><text:span text:style-name="Strong_20_Emphasis">Cyclic distribution</text:span> </text:p>
        </text:list-item>
      </text:list>
      <text:list text:style-name="L7">
        <text:list-item>
          <text:p text:style-name="P26"><text:span text:style-name="Source_20_Text">#pragma omp parallel for schedule(static,1)</text:span></text:p>
        </text:list-item>
      </text:list>
      <text:p text:style-name="Text_20_body">This interleaves rows, averaging the number of non‑zeros per thread.</text:p>
      <text:list text:style-name="L8">
        <text:list-item>
          <text:p text:style-name="P77"><text:span text:style-name="Strong_20_Emphasis">Weighted static partition</text:span><text:line-break/>Pre‑compute row weights = <text:span text:style-name="Source_20_Text">row_ptr[i+1] - row_ptr[i]</text:span>.<text:line-break/>Use a partitioner (e.g., METIS) to split rows so that total weight per partition is equal, then assign each partition to a thread.</text:p>
        </text:list-item>
      </text:list>
      <text:list text:style-name="L9">
        <text:list-item>
          <text:p text:style-name="P78"><text:span text:style-name="Strong_20_Emphasis">Dynamic schedule</text:span> </text:p>
        </text:list-item>
      </text:list>
      <text:list text:style-name="L10">
        <text:list-item>
          <text:p text:style-name="P27"><text:span text:style-name="Source_20_Text">#pragma omp parallel for schedule(dynamic, 64)</text:span></text:p>
        </text:list-item>
      </text:list>
      <text:p text:style-name="Text_20_body">Threads pull small blocks of rows when they finish, automatically balancing the load.</text:p>
      <text:list text:style-name="L11">
        <text:list-item>
          <text:p text:style-name="P79"><text:span text:style-name="Strong_20_Emphasis">Task‑based approach</text:span> </text:p>
        </text:list-item>
      </text:list>
      <text:list text:style-name="L12">
        <text:list-item text:start-value="4">
          <text:p text:style-name="P28"><text:span text:style-name="Source_20_Text">#pragma omp parallel</text:span></text:p>
          <text:p text:style-name="P29"><text:span text:style-name="Source_20_Text">{</text:span></text:p>
          <text:p text:style-name="P29"><text:span text:style-name="Source_20_Text"><text:s text:c="4"/>#pragma omp single</text:span></text:p>
          <text:p text:style-name="P29"><text:span text:style-name="Source_20_Text"><text:s text:c="4"/>for (int i = 0; i &lt; N; ++i)</text:span></text:p>
          <text:p text:style-name="P29"><text:span text:style-name="Source_20_Text"><text:s text:c="8"/>#pragma omp task firstprivate(i)</text:span></text:p>
          <text:p text:style-name="P29"><text:span text:style-name="Source_20_Text"><text:s text:c="8"/>{</text:span></text:p>
          <text:p text:style-name="P29"><text:span text:style-name="Source_20_Text"><text:s text:c="12"/>double sum = 0.0;</text:span></text:p>
          <text:p text:style-name="P29"><text:span text:style-name="Source_20_Text"><text:s text:c="12"/>for (int k = row_ptr[i]; k &lt; row_ptr[i+1]; ++k)</text:span></text:p>
          <text:p text:style-name="P29"><text:span text:style-name="Source_20_Text"><text:s text:c="16"/>sum += val[k] * x[col_ind[k]];</text:span></text:p>
          <text:p text:style-name="P29"><text:soft-page-break/><text:span text:style-name="Source_20_Text"><text:s text:c="12"/>y[i] = sum;</text:span></text:p>
          <text:p text:style-name="P29"><text:span text:style-name="Source_20_Text"><text:s text:c="8"/>}</text:span></text:p>
          <text:p text:style-name="P30"><text:span text:style-name="Source_20_Text">}</text:span></text:p>
          <text:p text:style-name="P48">The runtime’s work‑stealing scheduler will balance the tasks.</text:p>
        </text:list-item>
      </text:list>
      <text:p text:style-name="P9"/>
      <text:h text:style-name="P6" text:outline-level="2">7. Summary checklist</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p>
            </table:table-cell>
            <table:table-cell table:style-name="Table8.A1" office:value-type="string">
              <text:p text:style-name="Table_20_Heading">Question</text:p>
            </table:table-cell>
            <table:table-cell table:style-name="Table8.A1" office:value-type="string">
              <text:p text:style-name="Table_20_Heading">Answer</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text:span text:style-name="Strong_20_Emphasis">What is load imbalance?</text:span></text:p>
          </table:table-cell>
          <table:table-cell table:style-name="Table8.A1" office:value-type="string">
            <text:p text:style-name="Table_20_Contents">Unequal distribution of work among parallel workers, causing some to idle while others finish later.</text:p>
          </table:table-cell>
        </table:table-row>
        <table:table-row>
          <table:table-cell table:style-name="Table8.A1" office:value-type="string">
            <text:p text:style-name="Table_20_Contents">2</text:p>
          </table:table-cell>
          <table:table-cell table:style-name="Table8.A1" office:value-type="string">
            <text:p text:style-name="Table_20_Contents"><text:span text:style-name="Strong_20_Emphasis">Why does it matter?</text:span></text:p>
          </table:table-cell>
          <table:table-cell table:style-name="Table8.A1" office:value-type="string">
            <text:p text:style-name="Table_20_Contents">It reduces parallel efficiency, increases execution time, and can cause unpredictable performance.</text:p>
          </table:table-cell>
        </table:table-row>
        <table:table-row>
          <table:table-cell table:style-name="Table8.A1" office:value-type="string">
            <text:p text:style-name="Table_20_Contents">3</text:p>
          </table:table-cell>
          <table:table-cell table:style-name="Table8.A1" office:value-type="string">
            <text:p text:style-name="Table_20_Contents"><text:span text:style-name="Strong_20_Emphasis">How to measure it?</text:span></text:p>
          </table:table-cell>
          <table:table-cell table:style-name="Table8.A1" office:value-type="string">
            <text:p text:style-name="Table_20_Contents">Use metrics like load‑imbalance factor ( (T_{\max}/\bar{T}) ), standard deviation, idle‑time ratio, or profiling tools.</text:p>
          </table:table-cell>
        </table:table-row>
        <table:table-row>
          <table:table-cell table:style-name="Table8.A1" office:value-type="string">
            <text:p text:style-name="Table_20_Contents">4</text:p>
          </table:table-cell>
          <table:table-cell table:style-name="Table8.A1" office:value-type="string">
            <text:p text:style-name="Table_20_Contents"><text:span text:style-name="Strong_20_Emphasis">Common causes?</text:span></text:p>
          </table:table-cell>
          <table:table-cell table:style-name="Table8.A1" office:value-type="string">
            <text:p text:style-name="Table_20_Contents">Data‑dependent work, static partitioning on non‑uniform data, heterogeneous hardware, OS interference, inappropriate granularity.</text:p>
          </table:table-cell>
        </table:table-row>
        <table:table-row>
          <table:table-cell table:style-name="Table8.A1" office:value-type="string">
            <text:p text:style-name="Table_20_Contents">5</text:p>
          </table:table-cell>
          <table:table-cell table:style-name="Table8.A1" office:value-type="string">
            <text:p text:style-name="Table_20_Contents"><text:span text:style-name="Strong_20_Emphasis">How to detect?</text:span></text:p>
          </table:table-cell>
          <table:table-cell table:style-name="Table8.A1" office:value-type="string">
            <text:p text:style-name="Table_20_Contents">Barrier wait times, per‑thread counters, task‑graph visualisation, hardware counters, runtime statistics.</text:p>
          </table:table-cell>
        </table:table-row>
        <table:table-row>
          <table:table-cell table:style-name="Table8.A1" office:value-type="string">
            <text:p text:style-name="Table_20_Contents">6</text:p>
          </table:table-cell>
          <table:table-cell table:style-name="Table8.A1" office:value-type="string">
            <text:p text:style-name="Table_20_Contents"><text:span text:style-name="Strong_20_Emphasis">Mitigation strategies?</text:span></text:p>
          </table:table-cell>
          <table:table-cell table:style-name="Table8.A1" office:value-type="string">
            <text:p text:style-name="Table_20_Contents">Better static partitioning (weighted, cyclic), dynamic scheduling (work stealing, guided), hybrid static‑dynamic, algorithmic redesign, system‑level tuning.</text:p>
          </table:table-cell>
        </table:table-row>
        <table:table-row>
          <table:table-cell table:style-name="Table8.A1" office:value-type="string">
            <text:p text:style-name="Table_20_Contents">7</text:p>
          </table:table-cell>
          <table:table-cell table:style-name="Table8.A1" office:value-type="string">
            <text:p text:style-name="Table_20_Contents"><text:span text:style-name="Strong_20_Emphasis">When to choose which?</text:span></text:p>
          </table:table-cell>
          <table:table-cell table:style-name="Table8.A1" office:value-type="string">
            <text:p text:style-name="Table_20_Contents"><text:span text:style-name="Emphasis">Static</text:span> works when cost can be predicted accurately; <text:span text:style-name="Emphasis">dynamic</text:span> shines when cost is unpredictable or varies at runtime; <text:span text:style-name="Emphasis">hybrid</text:span> gives a good trade‑off for many real‑world codes.</text:p>
          </table:table-cell>
        </table:table-row>
      </table:table>
      <text:p text:style-name="P9"/>
      <text:h text:style-name="P7" text:outline-level="3">Bottom line</text:h>
      <text:p text:style-name="P12">Load imbalance is one of the primary performance‑limiting factors in any parallel application. By <text:span text:style-name="Strong_20_Emphasis">measuring</text:span> it, <text:span text:style-name="Strong_20_Emphasis">understanding</text:span> why it occurs in your particular code, and <text:span text:style-name="Strong_20_Emphasis">applying the appropriate balancing technique</text:span>, you can often reclaim a large portion of the theoretical speed‑up that parallel hardware promises. Happy balancing!</text:p>
      <text:p text:style-name="P2">Do you know how call tree is organized in cubegui (the scalasca cubegui software)?</text:p>
      <text:p text:style-name="P2">Below is a compact but complete description of <text:span text:style-name="Strong_20_Emphasis">how the call‑tree (also called the </text:span><text:span text:style-name="Strong_20_Emphasis"><text:span text:style-name="Emphasis">call‑path tree</text:span></text:span><text:span text:style-name="Strong_20_Emphasis">) is built, stored and displayed inside CubeGUI</text:span>, the graphical front‑end that ships with the Scalasca Cube performance‑analysis library.</text:p>
      <text:p text:style-name="P9"/>
      <text:h text:style-name="P6" text:outline-level="2">1. Where the tree comes from</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ource</text:p>
            </table:table-cell>
            <table:table-cell table:style-name="Table9.A1" office:value-type="string">
              <text:p text:style-name="Table_20_Heading">What it contains</text:p>
            </table:table-cell>
            <table:table-cell table:style-name="Table9.A1" office:value-type="string">
              <text:p text:style-name="Table_20_Heading">How it is written</text:p>
            </table:table-cell>
          </table:table-row>
        </table:table-header-rows>
        <table:table-row>
          <table:table-cell table:style-name="Table9.A1" office:value-type="string">
            <text:p text:style-name="Table_20_Contents"><text:span text:style-name="Strong_20_Emphasis">Instrumentation</text:span> (e.g., Score‑P, TAU, HPCToolkit, OpenMP, MPI)</text:p>
          </table:table-cell>
          <table:table-cell table:style-name="Table9.A1" office:value-type="string">
            <text:p text:style-name="Table_20_Contents">A <text:span text:style-name="Emphasis">region</text:span> for every function, OpenMP parallel region, MPI collective, user‑defined annotation, etc.</text:p>
          </table:table-cell>
          <table:table-cell table:style-name="Table9.A1" office:value-type="string">
            <text:p text:style-name="Table_20_Contents">Each region gets a <text:span text:style-name="Strong_20_Emphasis">region identifier</text:span> (a string plus source‑file/line information) and a <text:span text:style-name="Strong_20_Emphasis">parent‑region identifier</text:span> that tells where the region was entered from.</text:p>
          </table:table-cell>
        </table:table-row>
        <text:soft-page-break/>
        <table:table-row>
          <table:table-cell table:style-name="Table9.A1" office:value-type="string">
            <text:p text:style-name="Table_20_Contents"><text:span text:style-name="Strong_20_Emphasis">Cube file (.cube)</text:span></text:p>
          </table:table-cell>
          <table:table-cell table:style-name="Table9.A1" office:value-type="string">
            <text:p text:style-name="Table_20_Contents">The instrumentation library writes a <text:span text:style-name="Emphasis">cube</text:span> file that stores three orthogonal axes: <text:line-break/>• <text:span text:style-name="Strong_20_Emphasis">Metrics</text:span> (time, visits, flops, …) <text:line-break/>• <text:span text:style-name="Strong_20_Emphasis">Call‑paths</text:span> (the call‑tree) <text:line-break/>• <text:span text:style-name="Strong_20_Emphasis">System resources</text:span> (processes, threads, nodes).</text:p>
          </table:table-cell>
          <table:table-cell table:style-name="Table9.A1" office:value-type="string">
            <text:p text:style-name="Table_20_Contents">The call‑path axis is a <text:span text:style-name="Emphasis">list of call‑path IDs</text:span> where each ID is a <text:span text:style-name="Emphasis">path</text:span> of region IDs, e.g. <text:span text:style-name="Source_20_Text">0/4/12/7</text:span>. The root of the tree is always the <text:span text:style-name="Emphasis">“Program”</text:span> pseudo‑region (ID 0).</text:p>
          </table:table-cell>
        </table:table-row>
      </table:table>
      <text:p text:style-name="P12">CubeGUI does <text:span text:style-name="Strong_20_Emphasis">not</text:span> reconstruct the call graph from the raw trace; it simply reads the pre‑built call‑path list that is already stored in the .cube file.</text:p>
      <text:p text:style-name="P9"/>
      <text:h text:style-name="P6" text:outline-level="2">2. Internal representation in CubeGUI</text:h>
      <text:list text:style-name="L13">
        <text:list-item>
          <text:p text:style-name="P49"><text:span text:style-name="Strong_20_Emphasis"><text:span text:style-name="Source_20_Text">Cube</text:span></text:span><text:span text:style-name="Strong_20_Emphasis"> object</text:span> (from libcube) </text:p>
          <text:list>
            <text:list-item>
              <text:p text:style-name="P50">Holds three vectors: <text:span text:style-name="Source_20_Text">metrics</text:span>, <text:span text:style-name="Source_20_Text">cpaths</text:span>, <text:span text:style-name="Source_20_Text">cnodes</text:span>. </text:p>
            </text:list-item>
            <text:list-item>
              <text:p text:style-name="P50"><text:span text:style-name="Source_20_Text">cpaths</text:span> → <text:span text:style-name="Strong_20_Emphasis">call‑path objects</text:span> (<text:span text:style-name="Source_20_Text">Cnode</text:span>). </text:p>
            </text:list-item>
          </text:list>
        </text:list-item>
        <text:list-item>
          <text:p text:style-name="P49"><text:span text:style-name="Strong_20_Emphasis"><text:span text:style-name="Source_20_Text">Cnode</text:span></text:span><text:span text:style-name="Strong_20_Emphasis"> data structure</text:span> (one node per call‑path) </text:p>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Field</text:p>
            </table:table-cell>
            <table:table-cell table:style-name="Table10.A1" office:value-type="string">
              <text:p text:style-name="Table_20_Heading">Meaning</text:p>
            </table:table-cell>
          </table:table-row>
        </table:table-header-rows>
        <table:table-row>
          <table:table-cell table:style-name="Table10.A1" office:value-type="string">
            <text:p text:style-name="Table_20_Contents"><text:span text:style-name="Source_20_Text">id</text:span></text:p>
          </table:table-cell>
          <table:table-cell table:style-name="Table10.A1" office:value-type="string">
            <text:p text:style-name="Table_20_Contents">Integer, unique within the file (0 … N‑1).</text:p>
          </table:table-cell>
        </table:table-row>
        <table:table-row>
          <table:table-cell table:style-name="Table10.A1" office:value-type="string">
            <text:p text:style-name="Table_20_Contents"><text:span text:style-name="Source_20_Text">region</text:span></text:p>
          </table:table-cell>
          <table:table-cell table:style-name="Table10.A1" office:value-type="string">
            <text:p text:style-name="Table_20_Contents">Pointer to a <text:span text:style-name="Source_20_Text">Region</text:span> object (function name, file, line).</text:p>
          </table:table-cell>
        </table:table-row>
        <table:table-row>
          <table:table-cell table:style-name="Table10.A1" office:value-type="string">
            <text:p text:style-name="Table_20_Contents"><text:span text:style-name="Source_20_Text">parent</text:span></text:p>
          </table:table-cell>
          <table:table-cell table:style-name="Table10.A1" office:value-type="string">
            <text:p text:style-name="Table_20_Contents">Pointer to the parent <text:span text:style-name="Source_20_Text">Cnode</text:span> (NULL for the root).</text:p>
          </table:table-cell>
        </table:table-row>
        <table:table-row>
          <table:table-cell table:style-name="Table10.A1" office:value-type="string">
            <text:p text:style-name="Table_20_Contents"><text:span text:style-name="Source_20_Text">children</text:span></text:p>
          </table:table-cell>
          <table:table-cell table:style-name="Table10.A1" office:value-type="string">
            <text:p text:style-name="Table_20_Contents"><text:span text:style-name="Source_20_Text">std::vector&lt;Cnode*&gt;</text:span> – all immediate callees.</text:p>
          </table:table-cell>
        </table:table-row>
        <table:table-row>
          <table:table-cell table:style-name="Table10.A1" office:value-type="string">
            <text:p text:style-name="Table_20_Contents"><text:span text:style-name="Source_20_Text">depth</text:span></text:p>
          </table:table-cell>
          <table:table-cell table:style-name="Table10.A1" office:value-type="string">
            <text:p text:style-name="Table_20_Contents">Distance from the root (root = 0).</text:p>
          </table:table-cell>
        </table:table-row>
        <table:table-row>
          <table:table-cell table:style-name="Table10.A1" office:value-type="string">
            <text:p text:style-name="Table_20_Contents"><text:span text:style-name="Source_20_Text">mod</text:span></text:p>
          </table:table-cell>
          <table:table-cell table:style-name="Table10.A1" office:value-type="string">
            <text:p text:style-name="Table_20_Contents">Flags telling whether the node is <text:span text:style-name="Emphasis">collapsed</text:span> in the UI.</text:p>
          </table:table-cell>
        </table:table-row>
        <table:table-row>
          <table:table-cell table:style-name="Table10.A1" office:value-type="string">
            <text:p text:style-name="Table_20_Contents"><text:span text:style-name="Source_20_Text">incl/excl</text:span></text:p>
          </table:table-cell>
          <table:table-cell table:style-name="Table10.A1" office:value-type="string">
            <text:p text:style-name="Table_20_Contents">Cached inclusive / exclusive metric values for the currently selected metric (computed on demand).</text:p>
          </table:table-cell>
        </table:table-row>
      </table:table>
      <text:list text:continue-numbering="true" text:style-name="L13">
        <text:list-header>
          <text:p text:style-name="P49">The whole tree is a <text:span text:style-name="Strong_20_Emphasis">single rooted directed acyclic graph</text:span> (DAG) that is in practice a tree because each call‑path stores a <text:span text:style-name="Emphasis">single</text:span> parent. Recursion is represented by <text:span text:style-name="Emphasis">different</text:span> nodes for each recursion depth (e.g. <text:span text:style-name="Source_20_Text">foo@depth‑1</text:span>, <text:span text:style-name="Source_20_Text">foo@depth‑2</text:span>, …).</text:p>
        </text:list-header>
        <text:list-item>
          <text:p text:style-name="P49"><text:span text:style-name="Strong_20_Emphasis">Metric matrix</text:span> </text:p>
          <text:list>
            <text:list-item>
              <text:p text:style-name="P50">For each <text:span text:style-name="Source_20_Text">(cnode, system‑resource)</text:span> pair there is a <text:span text:style-name="Strong_20_Emphasis">value vector</text:span> of length <text:span text:style-name="Source_20_Text">#metrics</text:span>. </text:p>
            </text:list-item>
            <text:list-item>
              <text:p text:style-name="P50">The matrix is stored in a <text:span text:style-name="Emphasis">compressed sparse row</text:span> format; CubeGUI asks libcube for a specific value only when it needs to display it (lazy evaluation). </text:p>
            </text:list-item>
          </text:list>
        </text:list-item>
        <text:list-item>
          <text:p text:style-name="P49"><text:span text:style-name="Strong_20_Emphasis">Sorting / filtering caches</text:span> </text:p>
          <text:list>
            <text:list-item>
              <text:p text:style-name="P50">When you click on a column header, CubeGUI builds a <text:span text:style-name="Strong_20_Emphasis">sorted index</text:span> of <text:span text:style-name="Source_20_Text">cnode</text:span> pointers based on the selected metric (inclusive by default). </text:p>
            </text:list-item>
            <text:list-item>
              <text:p text:style-name="P49">The index is kept in a <text:span text:style-name="Source_20_Text">std::vector&lt;Cnode*&gt; sorted_cnodes;</text:span> and refreshed only if the metric or the view mode changes. </text:p>
            </text:list-item>
          </text:list>
        </text:list-item>
      </text:list>
      <text:p text:style-name="P9"/>
      <text:h text:style-name="P6" text:outline-level="2"><text:soft-page-break/>3. How the tree is <text:span text:style-name="Emphasis">presented</text:span> to the user</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UI component</text:p>
            </table:table-cell>
            <table:table-cell table:style-name="Table11.A1" office:value-type="string">
              <text:p text:style-name="Table_20_Heading">What it shows</text:p>
            </table:table-cell>
            <table:table-cell table:style-name="Table11.A1" office:value-type="string">
              <text:p text:style-name="Table_20_Heading">Interaction</text:p>
            </table:table-cell>
          </table:table-row>
        </table:table-header-rows>
        <table:table-row>
          <table:table-cell table:style-name="Table11.A1" office:value-type="string">
            <text:p text:style-name="Table_20_Contents"><text:span text:style-name="Strong_20_Emphasis">Tree view (left pane)</text:span></text:p>
          </table:table-cell>
          <table:table-cell table:style-name="Table11.A1" office:value-type="string">
            <text:p text:style-name="Table_20_Contents">Hierarchical list of call‑paths, each line = one <text:span text:style-name="Source_20_Text">Cnode</text:span>. The node label is <text:span text:style-name="Source_20_Text">&lt;region name&gt; (&lt;source file&gt;:&lt;line&gt;)</text:span>.</text:p>
          </table:table-cell>
          <table:table-cell table:style-name="Table11.A1" office:value-type="string">
            <text:p text:style-name="Table_20_Contents"><text:span text:style-name="Emphasis">Expand/Collapse</text:span> via the little triangles. <text:line-break/><text:span text:style-name="Emphasis">Right‑click</text:span> → <text:span text:style-name="Emphasis">“Collapse all”</text:span>, <text:span text:style-name="Emphasis">“Expand all”</text:span>, <text:span text:style-name="Emphasis">“Hide selected”</text:span>.</text:p>
          </table:table-cell>
        </table:table-row>
        <table:table-row>
          <table:table-cell table:style-name="Table11.A1" office:value-type="string">
            <text:p text:style-name="Table_20_Contents"><text:span text:style-name="Strong_20_Emphasis">Table view (right pane)</text:span></text:p>
          </table:table-cell>
          <table:table-cell table:style-name="Table11.A1" office:value-type="string">
            <text:p text:style-name="Table_20_Contents">Flat table that mirrors the tree order (or the sorted order). Columns: <text:span text:style-name="Source_20_Text">#</text:span>, <text:span text:style-name="Source_20_Text">Region</text:span>, <text:span text:style-name="Source_20_Text">#Calls</text:span>, <text:span text:style-name="Source_20_Text">Inclusive time</text:span>, <text:span text:style-name="Source_20_Text">Exclusive time</text:span>, …</text:p>
          </table:table-cell>
          <table:table-cell table:style-name="Table11.A1" office:value-type="string">
            <text:p text:style-name="Table_20_Contents"><text:span text:style-name="Emphasis">Click column header</text:span> → change sorting (inclusive/exclusive toggle). <text:line-break/><text:span text:style-name="Emphasis">Ctrl‑click</text:span> on rows → multi‑selection for aggregate operations.</text:p>
          </table:table-cell>
        </table:table-row>
        <table:table-row>
          <table:table-cell table:style-name="Table11.A1" office:value-type="string">
            <text:p text:style-name="Table_20_Contents"><text:span text:style-name="Strong_20_Emphasis">Metric selector</text:span> (top)</text:p>
          </table:table-cell>
          <table:table-cell table:style-name="Table11.A1" office:value-type="string">
            <text:p text:style-name="Table_20_Contents">Drop‑down list of all metrics in the file. Changing it triggers a <text:span text:style-name="Strong_20_Emphasis">re‑computation</text:span> of inclusive/exclusive values for the whole tree (cached in the <text:span text:style-name="Source_20_Text">Cnode</text:span> objects).</text:p>
          </table:table-cell>
          <table:table-cell table:style-name="Table11.A1" office:value-type="string">
            <text:p text:style-name="P25"/>
          </table:table-cell>
        </table:table-row>
        <table:table-row>
          <table:table-cell table:style-name="Table11.A1" office:value-type="string">
            <text:p text:style-name="Table_20_Contents"><text:span text:style-name="Strong_20_Emphasis">Flame‑graph mode</text:span></text:p>
          </table:table-cell>
          <table:table-cell table:style-name="Table11.A1" office:value-type="string">
            <text:p text:style-name="Table_20_Contents">A compact representation where each node’s width is proportional to its inclusive metric value. Internally the same <text:span text:style-name="Source_20_Text">Cnode</text:span> tree is traversed depth‑first and drawn with a different layout algorithm.</text:p>
          </table:table-cell>
          <table:table-cell table:style-name="Table11.A1" office:value-type="string">
            <text:p text:style-name="P25"/>
          </table:table-cell>
        </table:table-row>
      </table:table>
      <text:h text:style-name="P7" text:outline-level="3">3.1 Inclusive vs. Exclusive values</text:h>
      <text:p text:style-name="P12"><text:span text:style-name="Emphasis">Inclusive</text:span> (<text:span text:style-name="Source_20_Text">incl</text:span>) = metric value <text:span text:style-name="Strong_20_Emphasis">including</text:span> the time spent in all descendants.<text:line-break/><text:span text:style-name="Emphasis">Exclusive</text:span> (<text:span text:style-name="Source_20_Text">excl</text:span>) = metric value <text:span text:style-name="Strong_20_Emphasis">excluding</text:span> descendants (i.e., the time spent <text:span text:style-name="Emphasis">only</text:span> inside the region itself).</text:p>
      <text:p text:style-name="P12">CubeGUI obtains the inclusive value by <text:span text:style-name="Strong_20_Emphasis">summing</text:span> the exclusive values of the node and <text:span text:style-name="Emphasis">all</text:span> its children recursively (the libcube API already provides a function <text:span text:style-name="Source_20_Text">cube::Cnode::get_inclusive(metric, cnodes)</text:span> that does this efficiently). The exclusive value is read directly from the metric matrix.</text:p>
      <text:p text:style-name="P9"/>
      <text:h text:style-name="P6" text:outline-level="2">4. Special handling of recursion and multiple entrie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Situation</text:p>
            </table:table-cell>
            <table:table-cell table:style-name="Table12.A1" office:value-type="string">
              <text:p text:style-name="Table_20_Heading">How Cube stores it</text:p>
            </table:table-cell>
            <table:table-cell table:style-name="Table12.A1" office:value-type="string">
              <text:p text:style-name="Table_20_Heading">How CubeGUI shows it</text:p>
            </table:table-cell>
          </table:table-row>
        </table:table-header-rows>
        <table:table-row>
          <table:table-cell table:style-name="Table12.A1" office:value-type="string">
            <text:p text:style-name="Table_20_Contents"><text:span text:style-name="Strong_20_Emphasis">Direct recursion</text:span> (function calls itself)</text:p>
          </table:table-cell>
          <table:table-cell table:style-name="Table12.A1" office:value-type="string">
            <text:p text:style-name="Table_20_Contents">Each recursion depth creates a <text:span text:style-name="Emphasis">new</text:span> <text:span text:style-name="Source_20_Text">Cnode</text:span> with a distinct <text:span text:style-name="Source_20_Text">id</text:span>. The parent of depth‑k is depth‑k‑1.</text:p>
          </table:table-cell>
          <table:table-cell table:style-name="Table12.A1" office:value-type="string">
            <text:p text:style-name="Table_20_Contents">In the tree you see a <text:span text:style-name="Strong_20_Emphasis">chain</text:span> of the same region name with a suffix <text:span text:style-name="Source_20_Text">(depth k)</text:span> (the suffix is added by CubeGUI for clarity).</text:p>
          </table:table-cell>
        </table:table-row>
        <table:table-row>
          <table:table-cell table:style-name="Table12.A1" office:value-type="string">
            <text:p text:style-name="Table_20_Contents"><text:span text:style-name="Strong_20_Emphasis">Indirect recursion / cycles</text:span></text:p>
          </table:table-cell>
          <table:table-cell table:style-name="Table12.A1" office:value-type="string">
            <text:p text:style-name="Table_20_Contents">Because the call‑path list is linearized, a cycle becomes a <text:span text:style-name="Emphasis">different</text:span> path (e.g., <text:span text:style-name="Source_20_Text">A → B → C → A</text:span> becomes <text:span text:style-name="Source_20_Text">A@1 → B → C → A@2</text:span>).</text:p>
          </table:table-cell>
          <table:table-cell table:style-name="Table12.A1" office:value-type="string">
            <text:p text:style-name="Table_20_Contents">CubeGUI treats it as a deeper node; the UI does not display a “cycle” symbol – it simply looks like a deeper call of the same region.</text:p>
          </table:table-cell>
        </table:table-row>
        <table:table-row>
          <table:table-cell table:style-name="Table12.A1" office:value-type="string">
            <text:p text:style-name="Table_20_Contents"><text:span text:style-name="Strong_20_Emphasis">Multiple entry points</text:span> (same <text:soft-page-break/>function called from two different callers)</text:p>
          </table:table-cell>
          <table:table-cell table:style-name="Table12.A1" office:value-type="string">
            <text:p text:style-name="Table_20_Contents">Two distinct <text:span text:style-name="Source_20_Text">Cnode</text:span>s, each with <text:soft-page-break/>a different parent.</text:p>
          </table:table-cell>
          <table:table-cell table:style-name="Table12.A1" office:value-type="string">
            <text:p text:style-name="Table_20_Contents">Both appear in separate branches; the region name is identical, so you can <text:soft-page-break/>collapse them together with the <text:span text:style-name="Emphasis">“Merge identical regions”</text:span> option (available in the <text:span text:style-name="Emphasis">View → Merge nodes</text:span> menu).</text:p>
          </table:table-cell>
        </table:table-row>
      </table:table>
      <text:p text:style-name="P9"/>
      <text:h text:style-name="P6" text:outline-level="2">5. The “Merge identical regions” feature</text:h>
      <text:p text:style-name="P12">When this option is enabled, CubeGUI builds a <text:span text:style-name="Strong_20_Emphasis">virtual overlay tree</text:span>:</text:p>
      <text:list text:style-name="L14">
        <text:list-item>
          <text:p text:style-name="P51">It creates a <text:span text:style-name="Strong_20_Emphasis">hash map</text:span> <text:span text:style-name="Source_20_Text">std::unordered_map&lt;Region*, Cnode*&gt; merged_nodes;</text:span>. </text:p>
        </text:list-item>
        <text:list-item>
          <text:p text:style-name="P51">While traversing the original tree depth‑first, it checks whether a node with the same <text:span text:style-name="Source_20_Text">Region*</text:span> already exists in the <text:span text:style-name="Emphasis">merged</text:span> view. </text:p>
        </text:list-item>
        <text:list-item>
          <text:p text:style-name="P51">If it does, the new node becomes a <text:span text:style-name="Strong_20_Emphasis">child of the merged node</text:span> (the UI draws a <text:span text:style-name="Emphasis">dotted line</text:span> to indicate the “merged‑into” relationship). </text:p>
        </text:list-item>
        <text:list-item>
          <text:p text:style-name="P52">Inclusive values are recalculated as the sum of all occurrences of that region. </text:p>
        </text:list-item>
      </text:list>
      <text:p text:style-name="P12">This view is handy when you want a <text:span text:style-name="Strong_20_Emphasis">function‑centric</text:span> perspective rather than a call‑path‑centric one.</text:p>
      <text:p text:style-name="P9"/>
      <text:h text:style-name="P6" text:outline-level="2">6. Interaction with other CubeGUI panes</text:h>
      <table:table table:name="Table13" table:style-name="Table13">
        <table:table-column table:style-name="Table13.A"/>
        <table:table-column table:style-name="Table13.B"/>
        <table:table-header-rows>
          <table:table-row>
            <table:table-cell table:style-name="Table13.A1" office:value-type="string">
              <text:p text:style-name="Table_20_Heading">Pane</text:p>
            </table:table-cell>
            <table:table-cell table:style-name="Table13.A1" office:value-type="string">
              <text:p text:style-name="Table_20_Heading">Relationship to the call‑tree</text:p>
            </table:table-cell>
          </table:table-row>
        </table:table-header-rows>
        <table:table-row>
          <table:table-cell table:style-name="Table13.A1" office:value-type="string">
            <text:p text:style-name="Table_20_Contents"><text:span text:style-name="Strong_20_Emphasis">Flat profile</text:span> (bottom)</text:p>
          </table:table-cell>
          <table:table-cell table:style-name="Table13.A1" office:value-type="string">
            <text:p text:style-name="Table_20_Contents">Shows the same data as the tree but sorted by metric value; selecting a row highlights the corresponding node in the tree.</text:p>
          </table:table-cell>
        </table:table-row>
        <table:table-row>
          <table:table-cell table:style-name="Table13.A1" office:value-type="string">
            <text:p text:style-name="Table_20_Contents"><text:span text:style-name="Strong_20_Emphasis">Source view</text:span> (when you press <text:span text:style-name="Strong_20_Emphasis">F3</text:span>)</text:p>
          </table:table-cell>
          <table:table-cell table:style-name="Table13.A1" office:value-type="string">
            <text:p text:style-name="Table_20_Contents">CubeGUI asks libcube for the source‑file/line stored in the <text:span text:style-name="Source_20_Text">Region</text:span> object and opens the file at that line.</text:p>
          </table:table-cell>
        </table:table-row>
        <table:table-row>
          <table:table-cell table:style-name="Table13.A1" office:value-type="string">
            <text:p text:style-name="Table_20_Contents"><text:span text:style-name="Strong_20_Emphasis">Call‑graph (graph view)</text:span></text:p>
          </table:table-cell>
          <table:table-cell table:style-name="Table13.A1" office:value-type="string">
            <text:p text:style-name="Table_20_Contents">Internally the same <text:span text:style-name="Source_20_Text">Cnode</text:span> tree is exported to a DOT graph (<text:span text:style-name="Source_20_Text">cnode → callee edges</text:span>). The layout engine (GraphViz) uses the tree’s edges directly.</text:p>
          </table:table-cell>
        </table:table-row>
        <table:table-row>
          <table:table-cell table:style-name="Table13.A1" office:value-type="string">
            <text:p text:style-name="Table_20_Contents"><text:span text:style-name="Strong_20_Emphasis">Statistics tab</text:span></text:p>
          </table:table-cell>
          <table:table-cell table:style-name="Table13.A1" office:value-type="string">
            <text:p text:style-name="Table_20_Contents">Computes aggregates over the <text:span text:style-name="Strong_20_Emphasis">sub‑tree</text:span> rooted at the currently selected node (e.g., total time of a module).</text:p>
          </table:table-cell>
        </table:table-row>
      </table:table>
      <text:p text:style-name="P9"/>
      <text:h text:style-name="P6" text:outline-level="2">7. Implementation notes (for developers who want to dig into the code)</text:h>
      <text:list text:style-name="L15">
        <text:list-item>
          <text:p text:style-name="P53"><text:span text:style-name="Strong_20_Emphasis">File:</text:span> <text:span text:style-name="Source_20_Text">src/gui/TreeView.cpp</text:span> – builds the <text:span text:style-name="Source_20_Text">QTreeWidgetItem</text:span> hierarchy from the <text:span text:style-name="Source_20_Text">Cnode</text:span> vector. </text:p>
        </text:list-item>
        <text:list-item>
          <text:p text:style-name="P53"><text:span text:style-name="Strong_20_Emphasis">Lazy loading:</text:span> The UI only creates <text:span text:style-name="Source_20_Text">QTreeWidgetItem</text:span>s for the visible part of the tree; deeper branches are instantiated on‑demand when the user expands a node. This keeps the start‑up time linear in the number of <text:span text:style-name="Emphasis">top‑level</text:span> nodes, not in the total number of call‑paths (which can be &gt; 10⁶). </text:p>
        </text:list-item>
        <text:list-item>
          <text:p text:style-name="P53"><text:soft-page-break/><text:span text:style-name="Strong_20_Emphasis">Thread‑safety:</text:span> All UI updates are performed in the main Qt thread; the heavy metric aggregation (<text:span text:style-name="Source_20_Text">Cnode::get_inclusive</text:span>) runs in a background worker thread and signals the UI when ready. </text:p>
        </text:list-item>
        <text:list-item>
          <text:p text:style-name="P53"><text:span text:style-name="Strong_20_Emphasis">Cache invalidation:</text:span> When the user switches the metric, the <text:span text:style-name="Source_20_Text">inclCache</text:span> and <text:span text:style-name="Source_20_Text">exclCache</text:span> fields of every <text:span text:style-name="Source_20_Text">Cnode</text:span> are cleared (<text:span text:style-name="Source_20_Text">cnode-&gt;set_cached_value(-1)</text:span>). The next draw forces a recompute. </text:p>
        </text:list-item>
        <text:list-item>
          <text:p text:style-name="P54"><text:span text:style-name="Strong_20_Emphasis">Memory footprint:</text:span> The metric matrix is stored as <text:span text:style-name="Source_20_Text">double* values;</text:span> with size <text:span text:style-name="Source_20_Text">#cpaths * #metrics</text:span>. For a typical 1 M‑call‑path, 50‑metric file this is ~400 MiB. CubeGUI can operate in <text:span text:style-name="Emphasis">“memory‑reduced mode”</text:span> where only the currently selected metric is kept in RAM and the rest are streamed from the file on demand. </text:p>
        </text:list-item>
      </text:list>
      <text:p text:style-name="P9"/>
      <text:h text:style-name="P6" text:outline-level="2">8. Quick cheat‑sheet for everyday users</text:h>
      <table:table table:name="Table14" table:style-name="Table14">
        <table:table-column table:style-name="Table14.A"/>
        <table:table-column table:style-name="Table14.B"/>
        <table:table-header-rows>
          <table:table-row>
            <table:table-cell table:style-name="Table14.A1" office:value-type="string">
              <text:p text:style-name="Table_20_Heading">Action</text:p>
            </table:table-cell>
            <table:table-cell table:style-name="Table14.A1" office:value-type="string">
              <text:p text:style-name="Table_20_Heading">What happens under the hood</text:p>
            </table:table-cell>
          </table:table-row>
        </table:table-header-rows>
        <table:table-row>
          <table:table-cell table:style-name="Table14.A1" office:value-type="string">
            <text:p text:style-name="Table_20_Contents"><text:span text:style-name="Strong_20_Emphasis">Open a .cube file</text:span></text:p>
          </table:table-cell>
          <table:table-cell table:style-name="Table14.A1" office:value-type="string">
            <text:p text:style-name="Table_20_Contents">libcube reads the call‑path list → builds <text:span text:style-name="Source_20_Text">Cnode</text:span> tree → stores metric matrix.</text:p>
          </table:table-cell>
        </table:table-row>
        <table:table-row>
          <table:table-cell table:style-name="Table14.A1" office:value-type="string">
            <text:p text:style-name="Table_20_Contents"><text:span text:style-name="Strong_20_Emphasis">Select “Time (incl.)”</text:span></text:p>
          </table:table-cell>
          <table:table-cell table:style-name="Table14.A1" office:value-type="string">
            <text:p text:style-name="Table_20_Contents">All <text:span text:style-name="Source_20_Text">Cnode::inclCache</text:span> values are recomputed (depth‑first sum).</text:p>
          </table:table-cell>
        </table:table-row>
        <table:table-row>
          <table:table-cell table:style-name="Table14.A1" office:value-type="string">
            <text:p text:style-name="Table_20_Contents"><text:span text:style-name="Strong_20_Emphasis">Click the triangle to expand “main”</text:span></text:p>
          </table:table-cell>
          <table:table-cell table:style-name="Table14.A1" office:value-type="string">
            <text:p text:style-name="Table_20_Contents">UI creates <text:span text:style-name="Source_20_Text">QTreeWidgetItem</text:span>s for each child <text:span text:style-name="Source_20_Text">Cnode</text:span> of <text:span text:style-name="Source_20_Text">main</text:span>.</text:p>
          </table:table-cell>
        </table:table-row>
        <table:table-row>
          <table:table-cell table:style-name="Table14.A1" office:value-type="string">
            <text:p text:style-name="Table_20_Contents"><text:span text:style-name="Strong_20_Emphasis">Enable “Merge identical regions”</text:span></text:p>
          </table:table-cell>
          <table:table-cell table:style-name="Table14.A1" office:value-type="string">
            <text:p text:style-name="Table_20_Contents">A second overlay tree is built on the fly; UI shows only one entry per region.</text:p>
          </table:table-cell>
        </table:table-row>
        <table:table-row>
          <table:table-cell table:style-name="Table14.A1" office:value-type="string">
            <text:p text:style-name="Table_20_Contents"><text:span text:style-name="Strong_20_Emphasis">Sort by “#Calls”</text:span></text:p>
          </table:table-cell>
          <table:table-cell table:style-name="Table14.A1" office:value-type="string">
            <text:p text:style-name="Table_20_Contents">A sorted vector of pointers to <text:span text:style-name="Source_20_Text">Cnode</text:span>s is created; the table view is refreshed using that order.</text:p>
          </table:table-cell>
        </table:table-row>
        <table:table-row>
          <table:table-cell table:style-name="Table14.A1" office:value-type="string">
            <text:p text:style-name="Table_20_Contents"><text:span text:style-name="Strong_20_Emphasis">Export to CSV</text:span></text:p>
          </table:table-cell>
          <table:table-cell table:style-name="Table14.A1" office:value-type="string">
            <text:p text:style-name="Table_20_Contents">CubeGUI walks the tree in the current order and writes <text:span text:style-name="Source_20_Text">&lt;depth&gt;,&lt;region&gt;,&lt;incl&gt;,&lt;excl&gt;,…</text:span> lines.</text:p>
          </table:table-cell>
        </table:table-row>
      </table:table>
      <text:p text:style-name="P9"/>
      <text:h text:style-name="P7" text:outline-level="3">TL;DR</text:h>
      <text:list text:style-name="L16">
        <text:list-item>
          <text:p text:style-name="P55">The <text:span text:style-name="Strong_20_Emphasis">call tree</text:span> in CubeGUI is a direct mapping of the <text:span text:style-name="Strong_20_Emphasis">call‑path list</text:span> stored in the <text:span text:style-name="Source_20_Text">.cube</text:span> file. </text:p>
        </text:list-item>
        <text:list-item>
          <text:p text:style-name="P55">Each node (<text:span text:style-name="Source_20_Text">Cnode</text:span>) holds a reference to a <text:span text:style-name="Strong_20_Emphasis">region</text:span>, a pointer to its <text:span text:style-name="Strong_20_Emphasis">parent</text:span>, a list of <text:span text:style-name="Strong_20_Emphasis">children</text:span>, and cached <text:span text:style-name="Strong_20_Emphasis">inclusive/exclusive metric values</text:span>. </text:p>
        </text:list-item>
        <text:list-item>
          <text:p text:style-name="P55">The UI builds a <text:span text:style-name="Strong_20_Emphasis">Qt tree widget</text:span> from this structure on demand, supports <text:span text:style-name="Strong_20_Emphasis">sorting, collapsing, merging</text:span>, and can present the same data as a <text:span text:style-name="Strong_20_Emphasis">flame graph</text:span> or <text:span text:style-name="Strong_20_Emphasis">flat table</text:span>. </text:p>
        </text:list-item>
        <text:list-item>
          <text:p text:style-name="P55">Recursion is represented as deeper copies of the same region; multiple callers become separate branches. </text:p>
        </text:list-item>
        <text:list-item>
          <text:p text:style-name="P56">All heavy calculations (inclusive sums, metric switches) are performed by the <text:span text:style-name="Strong_20_Emphasis">Cube library</text:span> and cached per node; the UI merely visualises the resulting hierarchy. </text:p>
        </text:list-item>
      </text:list>
      <text:p text:style-name="P12">If you need to dive deeper (e.g., modify the way nodes are merged or add a new metric column), start with the <text:span text:style-name="Source_20_Text">Cnode</text:span> class in <text:span text:style-name="Source_20_Text">src/cube/cnode.cpp</text:span> and the <text:span text:style-name="Source_20_Text">TreeView</text:span> implementation in <text:span text:style-name="Source_20_Text">src/gui/TreeView.cpp</text:span>. The rest of the UI logic lives in the Qt‑based <text:span text:style-name="Source_20_Text">src/gui</text:span> folder. Happy profiling!</text:p>
      <text:p text:style-name="P19">How is data assigned inside a call tree?</text:p>
      <text:h text:style-name="P3" text:outline-level="2"><text:soft-page-break/>Data Assignment Inside a Call‑Tree</text:h>
      <text:p text:style-name="P12"><text:span text:style-name="Emphasis">(with a focus on the way Scalasca Cube (CubeGUI) does it, but the ideas apply to any hierarchical‑profile representation)</text:span> </text:p>
      <text:p text:style-name="P9"/>
      <text:h text:style-name="P7" text:outline-level="3">1. What “data” means in a call‑tree context</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Kind of data</text:p>
            </table:table-cell>
            <table:table-cell table:style-name="Table15.A1" office:value-type="string">
              <text:p text:style-name="Table_20_Heading">Typical example</text:p>
            </table:table-cell>
            <table:table-cell table:style-name="Table15.A1" office:value-type="string">
              <text:p text:style-name="Table_20_Heading">Where it lives</text:p>
            </table:table-cell>
          </table:table-row>
        </table:table-header-rows>
        <table:table-row>
          <table:table-cell table:style-name="Table15.A1" office:value-type="string">
            <text:p text:style-name="Table_20_Contents"><text:span text:style-name="Strong_20_Emphasis">Static meta‑data</text:span></text:p>
          </table:table-cell>
          <table:table-cell table:style-name="Table15.A1" office:value-type="string">
            <text:p text:style-name="Table_20_Contents">region name, source file, line number, region type (function, OpenMP parallel, MPI collective)</text:p>
          </table:table-cell>
          <table:table-cell table:style-name="Table15.A1" office:value-type="string">
            <text:p text:style-name="Table_20_Contents"><text:span text:style-name="Source_20_Text">Region</text:span> objects – written once by the instrumentation library.</text:p>
          </table:table-cell>
        </table:table-row>
        <table:table-row>
          <table:table-cell table:style-name="Table15.A1" office:value-type="string">
            <text:p text:style-name="Table_20_Contents"><text:span text:style-name="Strong_20_Emphasis">Dynamic performance data</text:span></text:p>
          </table:table-cell>
          <table:table-cell table:style-name="Table15.A1" office:value-type="string">
            <text:p text:style-name="Table_20_Contents">elapsed time, number of visits, FLOPs, cache‑misses, energy, etc.</text:p>
          </table:table-cell>
          <table:table-cell table:style-name="Table15.A1" office:value-type="string">
            <text:p text:style-name="Table_20_Contents">Metric matrix (<text:span text:style-name="Source_20_Text">#cpaths × #metrics</text:span>) stored in the <text:span text:style-name="Emphasis">.cube</text:span> file.</text:p>
          </table:table-cell>
        </table:table-row>
        <table:table-row>
          <table:table-cell table:style-name="Table15.A1" office:value-type="string">
            <text:p text:style-name="Table_20_Contents"><text:span text:style-name="Strong_20_Emphasis">Structural data</text:span></text:p>
          </table:table-cell>
          <table:table-cell table:style-name="Table15.A1" office:value-type="string">
            <text:p text:style-name="Table_20_Contents">parent‑child relationships, depth, recursion depth</text:p>
          </table:table-cell>
          <table:table-cell table:style-name="Table15.A1" office:value-type="string">
            <text:p text:style-name="Table_20_Contents"><text:span text:style-name="Source_20_Text">Cnode</text:span> (call‑path) objects – define the tree itself.</text:p>
          </table:table-cell>
        </table:table-row>
        <table:table-row>
          <table:table-cell table:style-name="Table15.A1" office:value-type="string">
            <text:p text:style-name="Table_20_Contents"><text:span text:style-name="Strong_20_Emphasis">Derived data</text:span></text:p>
          </table:table-cell>
          <table:table-cell table:style-name="Table15.A1" office:value-type="string">
            <text:p text:style-name="Table_20_Contents">inclusive time, exclusive time, percentages, aggregated values for a sub‑tree, call‑frequency ratios</text:p>
          </table:table-cell>
          <table:table-cell table:style-name="Table15.A1" office:value-type="string">
            <text:p text:style-name="Table_20_Contents">Computed on‑the‑fly (or cached) from the raw metric matrix.</text:p>
          </table:table-cell>
        </table:table-row>
      </table:table>
      <text:p text:style-name="P12">The <text:span text:style-name="Strong_20_Emphasis">assignment</text:span> process is the series of steps that connects the raw metric values to the right node (call‑path) in the tree and makes them available for visualisation, aggregation, and export.</text:p>
      <text:p text:style-name="P9"/>
      <text:h text:style-name="P6" text:outline-level="2">2. Where the raw numbers come from</text:h>
      <text:list text:style-name="L17">
        <text:list-item>
          <text:p text:style-name="P57"><text:span text:style-name="Strong_20_Emphasis">Instrumentation (Score‑P, TAU, etc.)</text:span> </text:p>
          <text:list>
            <text:list-item>
              <text:p text:style-name="P58">At each <text:span text:style-name="Emphasis">enter</text:span> of a region the library records a <text:span text:style-name="Strong_20_Emphasis">timestamp</text:span> (or increments a counter). </text:p>
            </text:list-item>
            <text:list-item>
              <text:p text:style-name="P58">At each <text:span text:style-name="Emphasis">exit</text:span> it records the <text:span text:style-name="Emphasis">exit</text:span> timestamp. </text:p>
            </text:list-item>
            <text:list-item>
              <text:p text:style-name="P58">The difference becomes the <text:span text:style-name="Strong_20_Emphasis">exclusive time</text:span> for that region instance. </text:p>
            </text:list-item>
          </text:list>
        </text:list-item>
        <text:list-item>
          <text:p text:style-name="P57"><text:span text:style-name="Strong_20_Emphasis">Trace → Cube conversion</text:span> </text:p>
          <text:list>
            <text:list-item>
              <text:p text:style-name="P58">The trace is collapsed into a <text:span text:style-name="Emphasis">call‑path list</text:span>. </text:p>
            </text:list-item>
            <text:list-item>
              <text:p text:style-name="P58">For each call‑path (a sequence of region IDs) a <text:span text:style-name="Strong_20_Emphasis">Cnode ID</text:span> is generated. </text:p>
            </text:list-item>
            <text:list-item>
              <text:p text:style-name="P58">For every Cnode‑/system‑resource pair the library writes a row of metric values (time, visits, …) into the <text:span text:style-name="Emphasis">.cube</text:span> file. </text:p>
            </text:list-item>
            <text:list-item>
              <text:p text:style-name="P57">The file therefore contains a <text:span text:style-name="Strong_20_Emphasis">complete metric matrix</text:span> that is <text:span text:style-name="Emphasis">already</text:span> indexed by call‑path. </text:p>
            </text:list-item>
          </text:list>
        </text:list-item>
      </text:list>
      <text:p text:style-name="P11"><text:span text:style-name="Strong_20_Emphasis">Key point:</text:span> The assignment of metric values to a call‑path is <text:span text:style-name="Strong_20_Emphasis">done while the .cube file is written</text:span>, not later by CubeGUI. CubeGUI merely <text:span text:style-name="Emphasis">reads</text:span> that mapping.</text:p>
      <text:p text:style-name="P9"/>
      <text:h text:style-name="P6" text:outline-level="2">3. In‑memory representation used by CubeGUI</text:h>
      <text:p text:style-name="P5"><text:span text:style-name="Source_20_Text">Cube</text:span></text:p>
      <text:p text:style-name="P10"><text:span text:style-name="Source_20_Text"><text:s/>├─ vector&lt;Region*&gt; <text:s text:c="9"/>// static meta‑data</text:span></text:p>
      <text:p text:style-name="P10"><text:span text:style-name="Source_20_Text"><text:s/>├─ vector&lt;Cnode*&gt; <text:s text:c="10"/>// one Cnode per call‑path</text:span></text:p>
      <text:p text:style-name="P13"><text:soft-page-break/><text:span text:style-name="Source_20_Text"><text:s/>└─ MetricMatrix <text:s text:c="13"/>// compressed storage of raw values</text:span></text:p>
      <text:h text:style-name="P8" text:outline-level="4">3.1 Cnode (call‑path node)</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Field</text:p>
            </table:table-cell>
            <table:table-cell table:style-name="Table16.A1" office:value-type="string">
              <text:p text:style-name="Table_20_Heading">Meaning</text:p>
            </table:table-cell>
            <table:table-cell table:style-name="Table16.A1" office:value-type="string">
              <text:p text:style-name="Table_20_Heading">How it is filled</text:p>
            </table:table-cell>
          </table:table-row>
        </table:table-header-rows>
        <table:table-row>
          <table:table-cell table:style-name="Table16.A1" office:value-type="string">
            <text:p text:style-name="Table_20_Contents"><text:span text:style-name="Source_20_Text">id</text:span></text:p>
          </table:table-cell>
          <table:table-cell table:style-name="Table16.A1" office:value-type="string">
            <text:p text:style-name="Table_20_Contents">unique integer (0…N‑1)</text:p>
          </table:table-cell>
          <table:table-cell table:style-name="Table16.A1" office:value-type="string">
            <text:p text:style-name="Table_20_Contents">taken from the order in the .cube file</text:p>
          </table:table-cell>
        </table:table-row>
        <table:table-row>
          <table:table-cell table:style-name="Table16.A1" office:value-type="string">
            <text:p text:style-name="Table_20_Contents"><text:span text:style-name="Source_20_Text">region</text:span></text:p>
          </table:table-cell>
          <table:table-cell table:style-name="Table16.A1" office:value-type="string">
            <text:p text:style-name="Table_20_Contents">pointer to the Region object that this node represents</text:p>
          </table:table-cell>
          <table:table-cell table:style-name="Table16.A1" office:value-type="string">
            <text:p text:style-name="Table_20_Contents">direct reference from the call‑path entry</text:p>
          </table:table-cell>
        </table:table-row>
        <table:table-row>
          <table:table-cell table:style-name="Table16.A1" office:value-type="string">
            <text:p text:style-name="Table_20_Contents"><text:span text:style-name="Source_20_Text">parent</text:span></text:p>
          </table:table-cell>
          <table:table-cell table:style-name="Table16.A1" office:value-type="string">
            <text:p text:style-name="Table_20_Contents">pointer to the parent Cnode (NULL for the root)</text:p>
          </table:table-cell>
          <table:table-cell table:style-name="Table16.A1" office:value-type="string">
            <text:p text:style-name="Table_20_Contents">derived from the “/”‑separated path stored in the file (e.g. <text:span text:style-name="Source_20_Text">0/4/12/7</text:span>)</text:p>
          </table:table-cell>
        </table:table-row>
        <table:table-row>
          <table:table-cell table:style-name="Table16.A1" office:value-type="string">
            <text:p text:style-name="Table_20_Contents"><text:span text:style-name="Source_20_Text">children</text:span></text:p>
          </table:table-cell>
          <table:table-cell table:style-name="Table16.A1" office:value-type="string">
            <text:p text:style-name="Table_20_Contents">vector of child Cnode pointers</text:p>
          </table:table-cell>
          <table:table-cell table:style-name="Table16.A1" office:value-type="string">
            <text:p text:style-name="Table_20_Contents">built by iterating over all Cnodes once and linking each to its parent</text:p>
          </table:table-cell>
        </table:table-row>
        <table:table-row>
          <table:table-cell table:style-name="Table16.A1" office:value-type="string">
            <text:p text:style-name="Table_20_Contents"><text:span text:style-name="Source_20_Text">depth</text:span></text:p>
          </table:table-cell>
          <table:table-cell table:style-name="Table16.A1" office:value-type="string">
            <text:p text:style-name="Table_20_Contents">distance from root (root = 0)</text:p>
          </table:table-cell>
          <table:table-cell table:style-name="Table16.A1" office:value-type="string">
            <text:p text:style-name="Table_20_Contents">computed during the linking pass</text:p>
          </table:table-cell>
        </table:table-row>
        <table:table-row>
          <table:table-cell table:style-name="Table16.A1" office:value-type="string">
            <text:p text:style-name="Table_20_Contents"><text:span text:style-name="Source_20_Text">inclCache[metric]</text:span> / <text:span text:style-name="Source_20_Text">exclCache[metric]</text:span></text:p>
          </table:table-cell>
          <table:table-cell table:style-name="Table16.A1" office:value-type="string">
            <text:p text:style-name="Table_20_Contents">cached inclusive / exclusive values for the currently selected metric</text:p>
          </table:table-cell>
          <table:table-cell table:style-name="Table16.A1" office:value-type="string">
            <text:p text:style-name="Table_20_Contents">filled lazily the first time the UI needs them</text:p>
          </table:table-cell>
        </table:table-row>
      </table:table>
      <text:h text:style-name="P8" text:outline-level="4">3.2 Metric matrix</text:h>
      <text:p text:style-name="P12"><text:span text:style-name="Emphasis">Compressed‑row</text:span> format (<text:span text:style-name="Source_20_Text">values[metric][cnode]</text:span>).<text:line-break/>Only the <text:span text:style-name="Strong_20_Emphasis">exclusive</text:span> numbers are stored explicitly.<text:line-break/><text:span text:style-name="Strong_20_Emphasis">Inclusive</text:span> numbers are <text:span text:style-name="Emphasis">derived</text:span> by summing exclusive values of the node and all its descendants.</text:p>
      <text:p text:style-name="P9"/>
      <text:h text:style-name="P6" text:outline-level="2">4. How CubeGUI <text:span text:style-name="Emphasis">assigns</text:span> the data to the tree at run‑time</text:h>
      <text:h text:style-name="P7" text:outline-level="3">4.1 Loading phase (when a .cube file is opened)</text:h>
      <text:list text:style-name="L18">
        <text:list-item>
          <text:p text:style-name="P59"><text:span text:style-name="Strong_20_Emphasis">Parse the file header</text:span> → discover the list of metrics, the list of regions, and the list of call‑paths. </text:p>
        </text:list-item>
        <text:list-item>
          <text:p text:style-name="P59"><text:span text:style-name="Strong_20_Emphasis">Create Region objects</text:span> → fill name, file, line, type. </text:p>
        </text:list-item>
        <text:list-item>
          <text:p text:style-name="P59"><text:span text:style-name="Strong_20_Emphasis">Create Cnode objects</text:span> → each call‑path becomes a Cnode; link parent/children. </text:p>
        </text:list-item>
        <text:list-item>
          <text:p text:style-name="P60"><text:span text:style-name="Strong_20_Emphasis">Map metric values</text:span> → for each metric the library builds an accessor that can return <text:span text:style-name="Source_20_Text">excl(cnode)</text:span> on demand. No copying of the whole matrix is done; the data stays in the file‑mapped memory region. </text:p>
        </text:list-item>
      </text:list>
      <text:p text:style-name="P12">Result: every Cnode <text:span text:style-name="Emphasis">knows</text:span> which region it belongs to and where its exclusive metric value lives.</text:p>
      <text:h text:style-name="P7" text:outline-level="3">4.2 First request for a metric (e.g. user selects “Time (incl.)”)</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tep</text:p>
            </table:table-cell>
            <table:table-cell table:style-name="Table17.A1" office:value-type="string">
              <text:p text:style-name="Table_20_Heading">Action (CubeGUI)</text:p>
            </table:table-cell>
            <table:table-cell table:style-name="Table17.A1" office:value-type="string">
              <text:p text:style-name="Table_20_Heading">Action (libcub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Clear all <text:span text:style-name="Source_20_Text">inclCache</text:span> entries for the old metric (set to “invalid”).</text:p>
          </table:table-cell>
          <table:table-cell table:style-name="Table17.A1" office:value-type="string">
            <text:p text:style-name="Table_20_Contents">–</text:p>
          </table:table-cell>
        </table:table-row>
        <table:table-row>
          <table:table-cell table:style-name="Table17.A1" office:value-type="string">
            <text:p text:style-name="Table_20_Contents">2</text:p>
          </table:table-cell>
          <table:table-cell table:style-name="Table17.A1" office:value-type="string">
            <text:p text:style-name="Table_20_Contents">For each Cnode (depth‑first) compute <text:span text:style-name="Strong_20_Emphasis">inclusive</text:span> value: <text:line-break/><text:span text:style-name="Source_20_Text">incl = excl + Σ child.incl</text:span></text:p>
          </table:table-cell>
          <table:table-cell table:style-name="Table17.A1" office:value-type="string">
            <text:p text:style-name="Table_20_Contents"><text:span text:style-name="Source_20_Text">Cnode::get_inclusive(metric)</text:span> performs the recursion and stores the result in <text:span text:style-name="Source_20_Text">inclCache</text:span>.</text:p>
          </table:table-cell>
        </table:table-row>
        <table:table-row>
          <table:table-cell table:style-name="Table17.A1" office:value-type="string">
            <text:p text:style-name="Table_20_Contents">3</text:p>
          </table:table-cell>
          <table:table-cell table:style-name="Table17.A1" office:value-type="string">
            <text:p text:style-name="Table_20_Contents">Store the computed inclusive value in the Cnode’s cache.</text:p>
          </table:table-cell>
          <table:table-cell table:style-name="Table17.A1" office:value-type="string">
            <text:p text:style-name="Table_20_Contents">–</text:p>
          </table:table-cell>
        </table:table-row>
        <text:soft-page-break/>
        <table:table-row>
          <table:table-cell table:style-name="Table17.A1" office:value-type="string">
            <text:p text:style-name="Table_20_Contents">4</text:p>
          </table:table-cell>
          <table:table-cell table:style-name="Table17.A1" office:value-type="string">
            <text:p text:style-name="Table_20_Contents">Populate the UI: <text:line-break/><text:span text:style-name="Emphasis">Tree view</text:span> gets the label <text:span text:style-name="Source_20_Text">region (incl)</text:span>; <text:line-break/><text:span text:style-name="Emphasis">Table view</text:span> gets the numeric columns.</text:p>
          </table:table-cell>
          <table:table-cell table:style-name="Table17.A1" office:value-type="string">
            <text:p text:style-name="Table_20_Contents">–</text:p>
          </table:table-cell>
        </table:table-row>
      </table:table>
      <text:p text:style-name="P12">Because the exclusive values are read directly from the matrix, step 2 is essentially a <text:span text:style-name="Strong_20_Emphasis">tree‑reduction</text:span> (O(#cnodes)). The result is cached, so subsequent UI refreshes (e.g., scrolling) are O(1) per node.</text:p>
      <text:h text:style-name="P7" text:outline-level="3">4.3 When the user expands/collapses a node</text:h>
      <text:p text:style-name="P12"><text:span text:style-name="Emphasis">No new calculations</text:span> are required. The UI simply shows/hides the already‑existing <text:span text:style-name="Source_20_Text">QTreeWidgetItem</text:span>s that were created when the node was first expanded. If the node has never been expanded, CubeGUI creates the child <text:span text:style-name="Source_20_Text">QTreeWidgetItem</text:span>s on‑demand, pulling the already‑computed metric values from the Cnode caches.</text:p>
      <text:h text:style-name="P7" text:outline-level="3">4 .4 Sorting or filtering</text:h>
      <text:list text:style-name="L19">
        <text:list-item>
          <text:p text:style-name="P61">Build a <text:span text:style-name="Strong_20_Emphasis">vector&lt;Cnode*&gt;</text:span> containing all (or a subset of) nodes. </text:p>
        </text:list-item>
        <text:list-item>
          <text:p text:style-name="P61">Sort the vector with a comparator that reads <text:span text:style-name="Source_20_Text">cnode-&gt;inclCache[metric]</text:span> (or <text:span text:style-name="Source_20_Text">exclCache</text:span>). </text:p>
        </text:list-item>
        <text:list-item>
          <text:p text:style-name="P62">The UI shows the nodes in that order; the underlying tree structure is unchanged. </text:p>
        </text:list-item>
      </text:list>
      <text:h text:style-name="P7" text:outline-level="3">4.5 Merging identical regions (optional view mode)</text:h>
      <text:p text:style-name="P12"><text:span text:style-name="Emphasis">Overlay</text:span> a second logical tree:</text:p>
      <text:list text:style-name="L20">
        <text:list-item>
          <text:p text:style-name="P63">Walk the original tree depth‑first. </text:p>
        </text:list-item>
        <text:list-item>
          <text:p text:style-name="P63">For each node, look up <text:span text:style-name="Source_20_Text">merged[region]</text:span>. </text:p>
          <text:list>
            <text:list-item>
              <text:p text:style-name="P63">If not present, create a <text:span text:style-name="Emphasis">merged node</text:span> and insert it into <text:span text:style-name="Source_20_Text">merged</text:span>. </text:p>
            </text:list-item>
            <text:list-item>
              <text:p text:style-name="P63">If present, attach the current node as a <text:span text:style-name="Strong_20_Emphasis">virtual child</text:span> of the merged node (the UI draws a dotted line). </text:p>
            </text:list-item>
          </text:list>
        </text:list-item>
        <text:list-item>
          <text:p text:style-name="P64">Re‑aggregate the metric values for the merged node by summing the inclusive values of all its occurrences. </text:p>
        </text:list-item>
      </text:list>
      <text:p text:style-name="P12">The original Cnode objects stay untouched; the merged view is purely a UI construct.</text:p>
      <text:p text:style-name="P9"/>
      <text:h text:style-name="P6" text:outline-level="2">5. Special Cases</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tuation</text:p>
            </table:table-cell>
            <table:table-cell table:style-name="Table18.A1" office:value-type="string">
              <text:p text:style-name="Table_20_Heading">How the raw data is stored</text:p>
            </table:table-cell>
            <table:table-cell table:style-name="Table18.A1" office:value-type="string">
              <text:p text:style-name="Table_20_Heading">How CubeGUI assigns it</text:p>
            </table:table-cell>
          </table:table-row>
        </table:table-header-rows>
        <table:table-row>
          <table:table-cell table:style-name="Table18.A1" office:value-type="string">
            <text:p text:style-name="Table_20_Contents"><text:span text:style-name="Strong_20_Emphasis">Direct recursion</text:span> (<text:span text:style-name="Source_20_Text">foo</text:span> calls itself)</text:p>
          </table:table-cell>
          <table:table-cell table:style-name="Table18.A1" office:value-type="string">
            <text:p text:style-name="Table_20_Contents">Each recursion depth gets its own Cnode (<text:span text:style-name="Source_20_Text">foo@depth‑1</text:span>, <text:span text:style-name="Source_20_Text">foo@depth‑2</text:span>, …) because the call‑path list contains a different <text:span text:style-name="Emphasis">path</text:span> for each depth.</text:p>
          </table:table-cell>
          <table:table-cell table:style-name="Table18.A1" office:value-type="string">
            <text:p text:style-name="Table_20_Contents">The tree shows a linear chain of identical region names; the UI may add a “(depth k)” suffix for readability.</text:p>
          </table:table-cell>
        </table:table-row>
        <table:table-row>
          <table:table-cell table:style-name="Table18.A1" office:value-type="string">
            <text:p text:style-name="Table_20_Contents"><text:span text:style-name="Strong_20_Emphasis">Indirect recursion / cycles</text:span></text:p>
          </table:table-cell>
          <table:table-cell table:style-name="Table18.A1" office:value-type="string">
            <text:p text:style-name="Table_20_Contents">The call‑path list is <text:span text:style-name="Strong_20_Emphasis">acyclic</text:span> – a cycle is unrolled into a longer path (e.g. <text:span text:style-name="Source_20_Text">A → B → C → A</text:span> becomes <text:span text:style-name="Source_20_Text">A@1 → B → C → A@2</text:span>).</text:p>
          </table:table-cell>
          <table:table-cell table:style-name="Table18.A1" office:value-type="string">
            <text:p text:style-name="Table_20_Contents">Same as direct recursion – appears as a deeper node. No explicit “cycle” flag exists.</text:p>
          </table:table-cell>
        </table:table-row>
        <text:soft-page-break/>
        <table:table-row>
          <table:table-cell table:style-name="Table18.A1" office:value-type="string">
            <text:p text:style-name="Table_20_Contents"><text:span text:style-name="Strong_20_Emphasis">Multiple callers</text:span> (same function invoked from two different parents)</text:p>
          </table:table-cell>
          <table:table-cell table:style-name="Table18.A1" office:value-type="string">
            <text:p text:style-name="Table_20_Contents">Two separate Cnodes, each with its own parent pointer, but both point to the same Region object.</text:p>
          </table:table-cell>
          <table:table-cell table:style-name="Table18.A1" office:value-type="string">
            <text:p text:style-name="Table_20_Contents">Both appear in different branches; the UI can <text:span text:style-name="Emphasis">merge</text:span> them if the user enables the “Merge identical regions” option.</text:p>
          </table:table-cell>
        </table:table-row>
        <table:table-row>
          <table:table-cell table:style-name="Table18.A1" office:value-type="string">
            <text:p text:style-name="Table_20_Contents"><text:span text:style-name="Strong_20_Emphasis">Per‑thread or per‑process metrics</text:span></text:p>
          </table:table-cell>
          <table:table-cell table:style-name="Table18.A1" office:value-type="string">
            <text:p text:style-name="Table_20_Contents">The metric matrix is three‑dimensional (<text:span text:style-name="Source_20_Text">cnode × system‑resource × metric</text:span>).</text:p>
          </table:table-cell>
          <table:table-cell table:style-name="Table18.A1" office:value-type="string">
            <text:p text:style-name="Table_20_Contents">When a particular system‑resource (e.g., MPI rank 3, thread 2) is selected, CubeGUI extracts the slice <text:span text:style-name="Source_20_Text">values[metric][cnode][resource]</text:span>. The inclusive aggregation is performed <text:span text:style-name="Emphasis">per resource</text:span>; the UI can also sum across resources to show a global view.</text:p>
          </table:table-cell>
        </table:table-row>
        <table:table-row>
          <table:table-cell table:style-name="Table18.A1" office:value-type="string">
            <text:p text:style-name="Table_20_Contents"><text:span text:style-name="Strong_20_Emphasis">Derived metrics (e.g., percentage of total time)</text:span></text:p>
          </table:table-cell>
          <table:table-cell table:style-name="Table18.A1" office:value-type="string">
            <text:p text:style-name="Table_20_Contents">Not stored; computed on‑the‑fly as <text:span text:style-name="Source_20_Text">incl / total_incl_of_root</text:span>.</text:p>
          </table:table-cell>
          <table:table-cell table:style-name="Table18.A1" office:value-type="string">
            <text:p text:style-name="Table_20_Contents">CubeGUI calculates the denominator once (root inclusive value) and then divides each node’s inclusive value when the column is displayed.</text:p>
          </table:table-cell>
        </table:table-row>
      </table:table>
      <text:p text:style-name="P9"/>
      <text:h text:style-name="P6" text:outline-level="2">6. Summary of the Assignment Process</text:h>
      <text:list text:style-name="L21">
        <text:list-item>
          <text:p text:style-name="P65"><text:span text:style-name="Strong_20_Emphasis">Instrumentation → raw exclusive numbers per region instance.</text:span> </text:p>
        </text:list-item>
        <text:list-item>
          <text:p text:style-name="P65"><text:span text:style-name="Strong_20_Emphasis">Trace → .cube conversion → call‑path list (Cnode IDs) + exclusive metric matrix.</text:span> </text:p>
        </text:list-item>
        <text:list-item>
          <text:p text:style-name="P65"><text:span text:style-name="Strong_20_Emphasis">CubeGUI reads the file:</text:span> </text:p>
          <text:list>
            <text:list-item>
              <text:p text:style-name="P65">Builds the <text:span text:style-name="Strong_20_Emphasis">static tree</text:span> (<text:span text:style-name="Source_20_Text">Cnode</text:span> objects linked by parent/child). </text:p>
            </text:list-item>
            <text:list-item>
              <text:p text:style-name="P65">Links each Cnode to its <text:span text:style-name="Strong_20_Emphasis">Region meta‑data</text:span>. </text:p>
            </text:list-item>
            <text:list-item>
              <text:p text:style-name="P65">Provides a <text:span text:style-name="Strong_20_Emphasis">random‑access accessor</text:span> to the exclusive values in the matrix. </text:p>
            </text:list-item>
          </text:list>
        </text:list-item>
        <text:list-item>
          <text:p text:style-name="P65"><text:span text:style-name="Strong_20_Emphasis">On demand:</text:span> </text:p>
          <text:list>
            <text:list-item>
              <text:p text:style-name="P65"><text:span text:style-name="Strong_20_Emphasis">Inclusive values</text:span> are computed by a depth‑first reduction and cached. </text:p>
            </text:list-item>
            <text:list-item>
              <text:p text:style-name="P65"><text:span text:style-name="Strong_20_Emphasis">Derived values</text:span> (percentages, sums over sub‑trees, merged‑node aggregates) are computed from the cached inclusive/exclusive numbers. </text:p>
            </text:list-item>
          </text:list>
        </text:list-item>
        <text:list-item>
          <text:p text:style-name="P66"><text:span text:style-name="Strong_20_Emphasis">UI rendering</text:span> simply pulls the already‑assigned numbers from the Cnode caches; expanding/collapsing, sorting, filtering, or switching metrics only triggers a recomputation of the caches (if the metric changed) or a re‑ordering of pointers (if sorting). </text:p>
        </text:list-item>
      </text:list>
      <text:p text:style-name="P12">Thus, <text:span text:style-name="Strong_20_Emphasis">data assignment inside a call tree is a two‑step process</text:span>: </text:p>
      <text:list text:style-name="L22">
        <text:list-item>
          <text:p text:style-name="P67"><text:span text:style-name="Strong_20_Emphasis">Static assignment</text:span> – done once when the .cube file is written, establishing a one‑to‑one mapping between a call‑path (Cnode) and its exclusive metric values. </text:p>
        </text:list-item>
        <text:list-item>
          <text:p text:style-name="P68"><text:span text:style-name="Strong_20_Emphasis">Dynamic assignment</text:span> – performed by CubeGUI at run‑time, where inclusive and derived values are propagated through the tree and cached for fast UI access. </text:p>
        </text:list-item>
      </text:list>
      <text:p text:style-name="P9"/>
      <text:h text:style-name="P7" text:outline-level="3">Quick Reference (for developer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Operation</text:p>
            </table:table-cell>
            <table:table-cell table:style-name="Table19.A1" office:value-type="string">
              <text:p text:style-name="Table_20_Heading">Function (libcube)</text:p>
            </table:table-cell>
            <table:table-cell table:style-name="Table19.A1" office:value-type="string">
              <text:p text:style-name="Table_20_Heading">Cache effect</text:p>
            </table:table-cell>
          </table:table-row>
        </table:table-header-rows>
        <table:table-row>
          <table:table-cell table:style-name="Table19.A1" office:value-type="string">
            <text:p text:style-name="Table_20_Contents"><text:span text:style-name="Source_20_Text">Cnode::get_exclusive(metric)</text:span></text:p>
          </table:table-cell>
          <table:table-cell table:style-name="Table19.A1" office:value-type="string">
            <text:p text:style-name="Table_20_Contents">reads directly from the metric matrix</text:p>
          </table:table-cell>
          <table:table-cell table:style-name="Table19.A1" office:value-type="string">
            <text:p text:style-name="Table_20_Contents">no cache</text:p>
          </table:table-cell>
        </table:table-row>
        <table:table-row>
          <table:table-cell table:style-name="Table19.A1" office:value-type="string">
            <text:p text:style-name="Table_20_Contents"><text:span text:style-name="Source_20_Text">Cnode::get_inclusive(m</text:span><text:soft-page-break/><text:span text:style-name="Source_20_Text">etric)</text:span></text:p>
          </table:table-cell>
          <table:table-cell table:style-name="Table19.A1" office:value-type="string">
            <text:p text:style-name="Table_20_Contents">recursively sums <text:span text:style-name="Source_20_Text">excl + </text:span><text:soft-page-break/><text:span text:style-name="Source_20_Text">child.incl</text:span></text:p>
          </table:table-cell>
          <table:table-cell table:style-name="Table19.A1" office:value-type="string">
            <text:p text:style-name="Table_20_Contents">stores result in <text:soft-page-break/><text:span text:style-name="Source_20_Text">inclCache[metric]</text:span></text:p>
          </table:table-cell>
        </table:table-row>
        <table:table-row>
          <table:table-cell table:style-name="Table19.A1" office:value-type="string">
            <text:p text:style-name="Table_20_Contents"><text:span text:style-name="Source_20_Text">Cnode::clear_cache(metric)</text:span></text:p>
          </table:table-cell>
          <table:table-cell table:style-name="Table19.A1" office:value-type="string">
            <text:p text:style-name="Table_20_Contents">sets <text:span text:style-name="Source_20_Text">inclCache[metric] = INVALID</text:span></text:p>
          </table:table-cell>
          <table:table-cell table:style-name="Table19.A1" office:value-type="string">
            <text:p text:style-name="Table_20_Contents">forces recompute on next request</text:p>
          </table:table-cell>
        </table:table-row>
        <table:table-row>
          <table:table-cell table:style-name="Table19.A1" office:value-type="string">
            <text:p text:style-name="Table_20_Contents"><text:span text:style-name="Source_20_Text">Cnode::aggregate_subtree(metric, &amp;result)</text:span></text:p>
          </table:table-cell>
          <table:table-cell table:style-name="Table19.A1" office:value-type="string">
            <text:p text:style-name="Table_20_Contents">depth‑first walk adding each node’s <text:span text:style-name="Source_20_Text">inclCache</text:span></text:p>
          </table:table-cell>
          <table:table-cell table:style-name="Table19.A1" office:value-type="string">
            <text:p text:style-name="Table_20_Contents">useful for custom aggregation</text:p>
          </table:table-cell>
        </table:table-row>
        <table:table-row>
          <table:table-cell table:style-name="Table19.A1" office:value-type="string">
            <text:p text:style-name="Table_20_Contents"><text:span text:style-name="Source_20_Text">Cnode::merge_into(Cnode *target)</text:span></text:p>
          </table:table-cell>
          <table:table-cell table:style-name="Table19.A1" office:value-type="string">
            <text:p text:style-name="Table_20_Contents">UI helper – adds this node to <text:span text:style-name="Source_20_Text">target-&gt;mergedChildren</text:span></text:p>
          </table:table-cell>
          <table:table-cell table:style-name="Table19.A1" office:value-type="string">
            <text:p text:style-name="Table_20_Contents">does not affect original metric data</text:p>
          </table:table-cell>
        </table:table-row>
      </table:table>
      <text:p text:style-name="P12">With this mental model you can predict exactly where a number you see in CubeGUI originates, how it is kept up‑to‑date, and what you need to touch if you want to add a new metric or a new view mode. Happy profiling!</text:p>
      <text:p text:style-name="P2">would i need to use a json to get a better explanation to find out if you (the LLM) can tranverse the calltree and find imbalances</text:p>
      <text:h text:style-name="P4" text:outline-level="3">Short answer</text:h>
      <text:p text:style-name="P12"><text:span text:style-name="Emphasis">No – you don’t have to give me a JSON file for me to tell you </text:span><text:span text:style-name="Emphasis"><text:span text:style-name="Strong_20_Emphasis">how</text:span></text:span><text:span text:style-name="Emphasis"> you could traverse a call‑tree and spot load‑imbalances. What I can do is:</text:span></text:p>
      <text:list text:style-name="L23">
        <text:list-item>
          <text:p text:style-name="P69"><text:span text:style-name="Strong_20_Emphasis">Explain the concepts</text:span> (what “load imbalance” means in a call‑tree, what data you need, what the usual metrics are). </text:p>
        </text:list-item>
        <text:list-item>
          <text:p text:style-name="P69"><text:span text:style-name="Strong_20_Emphasis">Show you a convenient data representation</text:span> (JSON is a good choice, but any hierarchical format works). </text:p>
        </text:list-item>
        <text:list-item>
          <text:p text:style-name="P70"><text:span text:style-name="Strong_20_Emphasis">Write example code</text:span> (Python, C++, or any language you prefer) that reads that representation, walks the tree, computes inclusive/exclusive times, and reports the imbalance. </text:p>
        </text:list-item>
      </text:list>
      <text:p text:style-name="P12">If you <text:span text:style-name="Emphasis">do</text:span> have a concrete JSON dump of your Cube/CubeGUI call‑tree, you can paste a small excerpt and I can point out exactly how the code would access the fields you care about.</text:p>
      <text:p text:style-name="P12">Below is a full‑featured guide that you can copy‑paste into a script and run on your own machine.</text:p>
      <text:p text:style-name="P9"/>
      <text:h text:style-name="P6" text:outline-level="2">1. What “load imbalance” means in a call‑tree</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Term</text:p>
            </table:table-cell>
            <table:table-cell table:style-name="Table20.A1" office:value-type="string">
              <text:p text:style-name="Table_20_Heading">Definition</text:p>
            </table:table-cell>
            <table:table-cell table:style-name="Table20.A1" office:value-type="string">
              <text:p text:style-name="Table_20_Heading">Why it matters</text:p>
            </table:table-cell>
          </table:table-row>
        </table:table-header-rows>
        <table:table-row>
          <table:table-cell table:style-name="Table20.A1" office:value-type="string">
            <text:p text:style-name="Table_20_Contents"><text:span text:style-name="Strong_20_Emphasis">Exclusive time</text:span> (<text:span text:style-name="Source_20_Text">excl</text:span>)</text:p>
          </table:table-cell>
          <table:table-cell table:style-name="Table20.A1" office:value-type="string">
            <text:p text:style-name="Table_20_Contents">Time spent <text:span text:style-name="Emphasis">inside</text:span> a region <text:span text:style-name="Emphasis">excluding</text:span> its callees.</text:p>
          </table:table-cell>
          <table:table-cell table:style-name="Table20.A1" office:value-type="string">
            <text:p text:style-name="Table_20_Contents">Shows the cost of the code that actually lives in that function.</text:p>
          </table:table-cell>
        </table:table-row>
        <table:table-row>
          <table:table-cell table:style-name="Table20.A1" office:value-type="string">
            <text:p text:style-name="Table_20_Contents"><text:span text:style-name="Strong_20_Emphasis">Inclusive time</text:span> (<text:span text:style-name="Source_20_Text">incl</text:span>)</text:p>
          </table:table-cell>
          <table:table-cell table:style-name="Table20.A1" office:value-type="string">
            <text:p text:style-name="Table_20_Contents">Time spent in the region <text:span text:style-name="Strong_20_Emphasis">plus</text:span> everything it calls (i.e., the whole sub‑tree).</text:p>
          </table:table-cell>
          <table:table-cell table:style-name="Table20.A1" office:value-type="string">
            <text:p text:style-name="Table_20_Contents">Determines how much of the total runtime is <text:span text:style-name="Emphasis">attributable</text:span> to that region.</text:p>
          </table:table-cell>
        </table:table-row>
        <table:table-row>
          <table:table-cell table:style-name="Table20.A1" office:value-type="string">
            <text:p text:style-name="Table_20_Contents"><text:span text:style-name="Strong_20_Emphasis">Load‑imbalance factor (LIF)</text:span></text:p>
          </table:table-cell>
          <table:table-cell table:style-name="Table20.A1" office:value-type="string">
            <text:p text:style-name="Table_20_Contents"><text:span text:style-name="Source_20_Text">LIF = max_i(incl_i) / mean_i(incl_i)</text:span> (or the same formula on exclusive times).</text:p>
          </table:table-cell>
          <table:table-cell table:style-name="Table20.A1" office:value-type="string">
            <text:p text:style-name="Table_20_Contents"><text:span text:style-name="Source_20_Text">LIF = 1.0</text:span> → perfect balance; <text:span text:style-name="Source_20_Text">LIF = 1.3</text:span> → the slowest call‑path does 30 % more work than the average.</text:p>
          </table:table-cell>
        </table:table-row>
        <table:table-row>
          <table:table-cell table:style-name="Table20.A1" office:value-type="string">
            <text:p text:style-name="Table_20_Contents"><text:span text:style-name="Strong_20_Emphasis">Imbalance hot‑spot</text:span></text:p>
          </table:table-cell>
          <table:table-cell table:style-name="Table20.A1" office:value-type="string">
            <text:p text:style-name="Table_20_Contents">The node(s) that contribute most to <text:span text:style-name="Source_20_Text">max_i(incl_i)</text:span>.</text:p>
          </table:table-cell>
          <table:table-cell table:style-name="Table20.A1" office:value-type="string">
            <text:p text:style-name="Table_20_Contents">Those are the places you usually want to refactor, parallelise differently, or rebalance.</text:p>
          </table:table-cell>
        </table:table-row>
      </table:table>
      <text:p text:style-name="P12"><text:soft-page-break/>In practice you’ll look at <text:span text:style-name="Strong_20_Emphasis">inclusive</text:span> times because they capture the whole call‑path cost, but for <text:span text:style-name="Emphasis">fine‑grained</text:span> debugging you may also inspect exclusive times.</text:p>
      <text:p text:style-name="P9"/>
      <text:h text:style-name="P6" text:outline-level="2">2. A convenient JSON schema for a call‑tree</text:h>
      <text:p text:style-name="P12">You can export the Cube call‑tree (or any profiler’s call‑graph) into a JSON document that mirrors the hierarchical structure:</text:p>
      <text:p text:style-name="Preformatted_20_Text"><text:span text:style-name="Source_20_Text">{</text:span></text:p>
      <text:p text:style-name="Preformatted_20_Text"><text:span text:style-name="Source_20_Text"><text:s text:c="2"/>"region": "PROGRAM", <text:s text:c="14"/>// pseudo‑root</text:span></text:p>
      <text:p text:style-name="Preformatted_20_Text"><text:span text:style-name="Source_20_Text"><text:s text:c="2"/>"file": null,</text:span></text:p>
      <text:p text:style-name="Preformatted_20_Text"><text:span text:style-name="Source_20_Text"><text:s text:c="2"/>"line": null,</text:span></text:p>
      <text:p text:style-name="Preformatted_20_Text"><text:span text:style-name="Source_20_Text"><text:s text:c="2"/>"metrics": {</text:span></text:p>
      <text:p text:style-name="Preformatted_20_Text"><text:span text:style-name="Source_20_Text"><text:s text:c="4"/>"calls": 1,</text:span></text:p>
      <text:p text:style-name="Preformatted_20_Text"><text:span text:style-name="Source_20_Text"><text:s text:c="4"/>"time_excl": 0.0,</text:span></text:p>
      <text:p text:style-name="Preformatted_20_Text"><text:span text:style-name="Source_20_Text"><text:s text:c="4"/>"time_incl": 123.45 <text:s text:c="14"/>// total runtime of the program</text:span></text:p>
      <text:p text:style-name="Preformatted_20_Text"><text:span text:style-name="Source_20_Text"><text:s text:c="2"/>},</text:span></text:p>
      <text:p text:style-name="Preformatted_20_Text"><text:span text:style-name="Source_20_Text"><text:s text:c="2"/>"children": [</text:span></text:p>
      <text:p text:style-name="Preformatted_20_Text"><text:span text:style-name="Source_20_Text"><text:s text:c="4"/>{</text:span></text:p>
      <text:p text:style-name="Preformatted_20_Text"><text:span text:style-name="Source_20_Text"><text:s text:c="6"/>"region": "main",</text:span></text:p>
      <text:p text:style-name="Preformatted_20_Text"><text:span text:style-name="Source_20_Text"><text:s text:c="6"/>"file": "main.cpp",</text:span></text:p>
      <text:p text:style-name="Preformatted_20_Text"><text:span text:style-name="Source_20_Text"><text:s text:c="6"/>"line": 12,</text:span></text:p>
      <text:p text:style-name="Preformatted_20_Text"><text:span text:style-name="Source_20_Text"><text:s text:c="6"/>"metrics": {</text:span></text:p>
      <text:p text:style-name="Preformatted_20_Text"><text:span text:style-name="Source_20_Text"><text:s text:c="8"/>"calls": 1,</text:span></text:p>
      <text:p text:style-name="Preformatted_20_Text"><text:span text:style-name="Source_20_Text"><text:s text:c="8"/>"time_excl": 2.3,</text:span></text:p>
      <text:p text:style-name="Preformatted_20_Text"><text:span text:style-name="Source_20_Text"><text:s text:c="8"/>"time_incl": 120.0</text:span></text:p>
      <text:p text:style-name="Preformatted_20_Text"><text:span text:style-name="Source_20_Text"><text:s text:c="6"/>},</text:span></text:p>
      <text:p text:style-name="Preformatted_20_Text"><text:span text:style-name="Source_20_Text"><text:s text:c="6"/>"children": [</text:span></text:p>
      <text:p text:style-name="Preformatted_20_Text"><text:span text:style-name="Source_20_Text"><text:s text:c="8"/>{</text:span></text:p>
      <text:p text:style-name="Preformatted_20_Text"><text:span text:style-name="Source_20_Text"><text:s text:c="10"/>"region": "foo",</text:span></text:p>
      <text:p text:style-name="Preformatted_20_Text"><text:span text:style-name="Source_20_Text"><text:s text:c="10"/>"file": "foo.cpp",</text:span></text:p>
      <text:p text:style-name="Preformatted_20_Text"><text:span text:style-name="Source_20_Text"><text:s text:c="10"/>"line": 45,</text:span></text:p>
      <text:p text:style-name="Preformatted_20_Text"><text:span text:style-name="Source_20_Text"><text:s text:c="10"/>"metrics": {</text:span></text:p>
      <text:p text:style-name="Preformatted_20_Text"><text:span text:style-name="Source_20_Text"><text:s text:c="12"/>"calls": 1000,</text:span></text:p>
      <text:p text:style-name="Preformatted_20_Text"><text:span text:style-name="Source_20_Text"><text:s text:c="12"/>"time_excl": 30.0,</text:span></text:p>
      <text:p text:style-name="Preformatted_20_Text"><text:span text:style-name="Source_20_Text"><text:s text:c="12"/>"time_incl": 80.0</text:span></text:p>
      <text:p text:style-name="Preformatted_20_Text"><text:span text:style-name="Source_20_Text"><text:s text:c="10"/>},</text:span></text:p>
      <text:p text:style-name="Preformatted_20_Text"><text:span text:style-name="Source_20_Text"><text:s text:c="10"/>"children": [ … ]</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10"/>"region": "bar",</text:span></text:p>
      <text:p text:style-name="Preformatted_20_Text"><text:span text:style-name="Source_20_Text"><text:s text:c="10"/>"file": "bar.cpp",</text:span></text:p>
      <text:p text:style-name="Preformatted_20_Text"><text:span text:style-name="Source_20_Text"><text:s text:c="10"/>"line": 78,</text:span></text:p>
      <text:p text:style-name="Preformatted_20_Text"><text:span text:style-name="Source_20_Text"><text:s text:c="10"/>"metrics": {</text:span></text:p>
      <text:p text:style-name="Preformatted_20_Text"><text:span text:style-name="Source_20_Text"><text:s text:c="12"/>"calls": 500,</text:span></text:p>
      <text:p text:style-name="Preformatted_20_Text"><text:span text:style-name="Source_20_Text"><text:s text:c="12"/>"time_excl": 10.0,</text:span></text:p>
      <text:p text:style-name="Preformatted_20_Text"><text:span text:style-name="Source_20_Text"><text:s text:c="12"/>"time_incl": 25.0</text:span></text:p>
      <text:p text:style-name="Preformatted_20_Text"><text:span text:style-name="Source_20_Text"><text:s text:c="10"/>},</text:span></text:p>
      <text:p text:style-name="Preformatted_20_Text"><text:span text:style-name="Source_20_Text"><text:s text:c="10"/>"children": [ … ]</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15"><text:span text:style-name="Source_20_Text">}</text:span></text:p>
      <text:p text:style-name="Text_20_body"><text:span text:style-name="Strong_20_Emphasis">Key points</text:span></text:p>
      <text:list text:style-name="L24">
        <text:list-item>
          <text:p text:style-name="P81">Each node has a <text:span text:style-name="Source_20_Text">metrics</text:span> object that contains at least <text:span text:style-name="Source_20_Text">time_excl</text:span> (exclusive) and optionally <text:span text:style-name="Source_20_Text">time_incl</text:span>. </text:p>
        </text:list-item>
        <text:list-item>
          <text:p text:style-name="P81"><text:soft-page-break/>If <text:span text:style-name="Source_20_Text">time_incl</text:span> is <text:span text:style-name="Strong_20_Emphasis">missing</text:span>, you can compute it on the fly by summing <text:span text:style-name="Source_20_Text">time_excl</text:span> of the node and all its descendants (a simple post‑order traversal). </text:p>
        </text:list-item>
        <text:list-item>
          <text:p text:style-name="P80">The <text:span text:style-name="Source_20_Text">children</text:span> array holds the direct callees – this is the exact shape CubeGUI shows in its tree view. </text:p>
        </text:list-item>
      </text:list>
      <text:p text:style-name="Text_20_body">You can generate such JSON directly from the Cube API (<text:span text:style-name="Source_20_Text">cube::Cnode</text:span> → <text:span text:style-name="Source_20_Text">region</text:span> → <text:span text:style-name="Source_20_Text">metrics</text:span>) or by writing a small converter script in C++/Python that walks the Cube data structures.</text:p>
      <text:p text:style-name="Horizontal_20_Line"/>
      <text:h text:style-name="Heading_20_2" text:outline-level="2">3. Walking the tree and detecting imbalance (Python example)</text:h>
      <text:p text:style-name="Text_20_body">Below is a <text:span text:style-name="Strong_20_Emphasis">stand‑alone</text:span> script that:</text:p>
      <text:list text:style-name="L25">
        <text:list-item>
          <text:p text:style-name="P83">Loads the JSON file. </text:p>
        </text:list-item>
        <text:list-item>
          <text:p text:style-name="P83">Computes inclusive times (if they are not already present). </text:p>
        </text:list-item>
        <text:list-item>
          <text:p text:style-name="P83">Calculates the load‑imbalance factor for both exclusive and inclusive times. </text:p>
        </text:list-item>
        <text:list-item>
          <text:p text:style-name="P82">Prints the <text:span text:style-name="Emphasis">top‑k</text:span> hot‑spots (the nodes that dominate the max time). </text:p>
        </text:list-item>
      </text:list>
      <text:p text:style-name="Preformatted_20_Text"><text:span text:style-name="Source_20_Text">#!/usr/bin/env python3</text:span></text:p>
      <text:p text:style-name="Preformatted_20_Text"><text:span text:style-name="Source_20_Text"># --------------------------------------------------------------</text:span></text:p>
      <text:p text:style-name="Preformatted_20_Text"><text:span text:style-name="Source_20_Text"># Call‑tree imbalance analyzer</text:span></text:p>
      <text:p text:style-name="Preformatted_20_Text"><text:span text:style-name="Source_20_Text"># --------------------------------------------------------------</text:span></text:p>
      <text:p text:style-name="Preformatted_20_Text"><text:span text:style-name="Source_20_Text">import json</text:span></text:p>
      <text:p text:style-name="Preformatted_20_Text"><text:span text:style-name="Source_20_Text">import sys</text:span></text:p>
      <text:p text:style-name="Preformatted_20_Text"><text:span text:style-name="Source_20_Text">from collections import deque</text:span></text:p>
      <text:p text:style-name="Preformatted_20_Text"><text:span text:style-name="Source_20_Text">from typing import Dict, List, Tuple, Any</text:span></text:p>
      <text:p text:style-name="Preformatted_20_Text"/>
      <text:p text:style-name="Preformatted_20_Text"><text:span text:style-name="Source_20_Text"># ------------------------------------------------------------------</text:span></text:p>
      <text:p text:style-name="Preformatted_20_Text"><text:span text:style-name="Source_20_Text"># Helper: compute inclusive time recursively (post‑order)</text:span></text:p>
      <text:p text:style-name="Preformatted_20_Text"><text:span text:style-name="Source_20_Text"># ------------------------------------------------------------------</text:span></text:p>
      <text:p text:style-name="Preformatted_20_Text"><text:span text:style-name="Source_20_Text">def compute_inclusive(node: Dict) -&gt; float:</text:span></text:p>
      <text:p text:style-name="Preformatted_20_Text"><text:span text:style-name="Source_20_Text"><text:s text:c="4"/>"""Return inclusive time for *node* and store it in node['metrics']['time_incl']."""</text:span></text:p>
      <text:p text:style-name="Preformatted_20_Text"><text:span text:style-name="Source_20_Text"><text:s text:c="4"/>excl = node["metrics"]["time_excl"]</text:span></text:p>
      <text:p text:style-name="Preformatted_20_Text"><text:span text:style-name="Source_20_Text"><text:s text:c="4"/>incl = excl</text:span></text:p>
      <text:p text:style-name="Preformatted_20_Text"><text:span text:style-name="Source_20_Text"><text:s text:c="4"/>for child in node.get("children", []):</text:span></text:p>
      <text:p text:style-name="Preformatted_20_Text"><text:span text:style-name="Source_20_Text"><text:s text:c="8"/>incl += compute_inclusive(child)</text:span></text:p>
      <text:p text:style-name="Preformatted_20_Text"><text:span text:style-name="Source_20_Text"><text:s text:c="4"/>node["metrics"]["time_incl"] = incl</text:span></text:p>
      <text:p text:style-name="Preformatted_20_Text"><text:span text:style-name="Source_20_Text"><text:s text:c="4"/>return incl</text:span></text:p>
      <text:p text:style-name="Preformatted_20_Text"/>
      <text:p text:style-name="Preformatted_20_Text"><text:span text:style-name="Source_20_Text"># ------------------------------------------------------------------</text:span></text:p>
      <text:p text:style-name="Preformatted_20_Text"><text:span text:style-name="Source_20_Text"># Helper: flatten the tree into a list of (path, node) tuples</text:span></text:p>
      <text:p text:style-name="Preformatted_20_Text"><text:span text:style-name="Source_20_Text"># ------------------------------------------------------------------</text:span></text:p>
      <text:p text:style-name="Preformatted_20_Text"><text:span text:style-name="Source_20_Text">def flatten(node: Dict, prefix: List[str] = None) -&gt; List[Tuple[str, Dict]]:</text:span></text:p>
      <text:p text:style-name="Preformatted_20_Text"><text:span text:style-name="Source_20_Text"><text:s text:c="4"/>"""Return a list of (full_path, node) where full_path is a string like</text:span></text:p>
      <text:p text:style-name="Preformatted_20_Text"><text:span text:style-name="Source_20_Text"><text:s text:c="4"/>PROGRAM/main/foo."""</text:span></text:p>
      <text:p text:style-name="Preformatted_20_Text"><text:span text:style-name="Source_20_Text"><text:s text:c="4"/>if prefix is None:</text:span></text:p>
      <text:p text:style-name="Preformatted_20_Text"><text:span text:style-name="Source_20_Text"><text:s text:c="8"/>prefix = []</text:span></text:p>
      <text:p text:style-name="Preformatted_20_Text"><text:span text:style-name="Source_20_Text"><text:s text:c="4"/>path = "/".join(prefix + [node["region"]])</text:span></text:p>
      <text:p text:style-name="Preformatted_20_Text"><text:span text:style-name="Source_20_Text"><text:s text:c="4"/>flat = [(path, node)]</text:span></text:p>
      <text:p text:style-name="Preformatted_20_Text"><text:span text:style-name="Source_20_Text"><text:s text:c="4"/>for child in node.get("children", []):</text:span></text:p>
      <text:p text:style-name="Preformatted_20_Text"><text:span text:style-name="Source_20_Text"><text:s text:c="8"/>flat.extend(flatten(child, prefix + [node["region"]]))</text:span></text:p>
      <text:p text:style-name="Preformatted_20_Text"><text:span text:style-name="Source_20_Text"><text:s text:c="4"/>return flat</text:span></text:p>
      <text:p text:style-name="Preformatted_20_Text"/>
      <text:p text:style-name="Preformatted_20_Text"><text:span text:style-name="Source_20_Text"># ------------------------------------------------------------------</text:span></text:p>
      <text:p text:style-name="Preformatted_20_Text"><text:span text:style-name="Source_20_Text"># Main analysis routine</text:span></text:p>
      <text:p text:style-name="Preformatted_20_Text"><text:span text:style-name="Source_20_Text"># ------------------------------------------------------------------</text:span></text:p>
      <text:p text:style-name="Preformatted_20_Text"><text:soft-page-break/><text:span text:style-name="Source_20_Text">def analyse(tree: Dict, top_k: int = 5) -&gt; None:</text:span></text:p>
      <text:p text:style-name="Preformatted_20_Text"><text:span text:style-name="Source_20_Text"><text:s text:c="4"/># 1️⃣ <text:s/>Make sure inclusive times exist</text:span></text:p>
      <text:p text:style-name="Preformatted_20_Text"><text:span text:style-name="Source_20_Text"><text:s text:c="4"/>compute_inclusive(tree)</text:span></text:p>
      <text:p text:style-name="Preformatted_20_Text"/>
      <text:p text:style-name="Preformatted_20_Text"><text:span text:style-name="Source_20_Text"><text:s text:c="4"/># 2️⃣ <text:s/>Flatten the tree for easy statistics</text:span></text:p>
      <text:p text:style-name="Preformatted_20_Text"><text:span text:style-name="Source_20_Text"><text:s text:c="4"/>flat = flatten(tree)</text:span></text:p>
      <text:p text:style-name="Preformatted_20_Text"/>
      <text:p text:style-name="Preformatted_20_Text"><text:span text:style-name="Source_20_Text"><text:s text:c="4"/># 3️⃣ <text:s/>Gather exclusive and inclusive times</text:span></text:p>
      <text:p text:style-name="Preformatted_20_Text"><text:span text:style-name="Source_20_Text"><text:s text:c="4"/>excl_vals = [(p, n["metrics"]["time_excl"]) for p, n in flat]</text:span></text:p>
      <text:p text:style-name="Preformatted_20_Text"><text:span text:style-name="Source_20_Text"><text:s text:c="4"/>incl_vals = [(p, n["metrics"]["time_incl"]) for p, n in flat]</text:span></text:p>
      <text:p text:style-name="Preformatted_20_Text"/>
      <text:p text:style-name="Preformatted_20_Text"><text:span text:style-name="Source_20_Text"><text:s text:c="4"/># 4️⃣ <text:s/>Compute statistics</text:span></text:p>
      <text:p text:style-name="Preformatted_20_Text"><text:span text:style-name="Source_20_Text"><text:s text:c="4"/>def stats(vals: List[Tuple[str, float]]) -&gt; Tuple[float, float, float]:</text:span></text:p>
      <text:p text:style-name="Preformatted_20_Text"><text:span text:style-name="Source_20_Text"><text:s text:c="8"/>times = [t for _, t in vals]</text:span></text:p>
      <text:p text:style-name="Preformatted_20_Text"><text:span text:style-name="Source_20_Text"><text:s text:c="8"/>mean = sum(times) / len(times)</text:span></text:p>
      <text:p text:style-name="Preformatted_20_Text"><text:span text:style-name="Source_20_Text"><text:s text:c="8"/>mx = max(times)</text:span></text:p>
      <text:p text:style-name="Preformatted_20_Text"><text:span text:style-name="Source_20_Text"><text:s text:c="8"/>lif = mx / mean if mean &gt; 0 else float("inf")</text:span></text:p>
      <text:p text:style-name="Preformatted_20_Text"><text:span text:style-name="Source_20_Text"><text:s text:c="8"/>return mean, mx, lif</text:span></text:p>
      <text:p text:style-name="Preformatted_20_Text"/>
      <text:p text:style-name="Preformatted_20_Text"><text:span text:style-name="Source_20_Text"><text:s text:c="4"/>excl_mean, excl_max, excl_lif = stats(excl_vals)</text:span></text:p>
      <text:p text:style-name="Preformatted_20_Text"><text:span text:style-name="Source_20_Text"><text:s text:c="4"/>incl_mean, incl_max, incl_lif = stats(incl_vals)</text:span></text:p>
      <text:p text:style-name="Preformatted_20_Text"/>
      <text:p text:style-name="Preformatted_20_Text"><text:span text:style-name="Source_20_Text"><text:s text:c="4"/># 5️⃣ <text:s/>Print a concise report</text:span></text:p>
      <text:p text:style-name="Preformatted_20_Text"><text:span text:style-name="Source_20_Text"><text:s text:c="4"/>print("\n=== Load‑imbalance report ===")</text:span></text:p>
      <text:p text:style-name="Preformatted_20_Text"><text:span text:style-name="Source_20_Text"><text:s text:c="4"/>print(f"Total nodes examined: {len(flat)}")</text:span></text:p>
      <text:p text:style-name="Preformatted_20_Text"><text:span text:style-name="Source_20_Text"><text:s text:c="4"/>print("\nExclusive time:")</text:span></text:p>
      <text:p text:style-name="Preformatted_20_Text"><text:span text:style-name="Source_20_Text"><text:s text:c="4"/>print(f" <text:s/>mean = {excl_mean:.3f}s <text:s text:c="2"/>max = {excl_max:.3f}s <text:s text:c="2"/>LIF = {excl_lif:.2f}")</text:span></text:p>
      <text:p text:style-name="Preformatted_20_Text"><text:span text:style-name="Source_20_Text"><text:s text:c="4"/>print("\nInclusive time:")</text:span></text:p>
      <text:p text:style-name="Preformatted_20_Text"><text:span text:style-name="Source_20_Text"><text:s text:c="4"/>print(f" <text:s/>mean = {incl_mean:.3f}s <text:s text:c="2"/>max = {incl_max:.3f}s <text:s text:c="2"/>LIF = {incl_lif:.2f}")</text:span></text:p>
      <text:p text:style-name="Preformatted_20_Text"/>
      <text:p text:style-name="Preformatted_20_Text"><text:span text:style-name="Source_20_Text"><text:s text:c="4"/># 6️⃣ <text:s/>Show the top‑k hot‑spots (by inclusive time)</text:span></text:p>
      <text:p text:style-name="Preformatted_20_Text"><text:span text:style-name="Source_20_Text"><text:s text:c="4"/>print(f"\nTop {top_k} inclusive‑time hot‑spots:")</text:span></text:p>
      <text:p text:style-name="Preformatted_20_Text"><text:span text:style-name="Source_20_Text"><text:s text:c="4"/>for path, t in sorted(incl_vals, key=lambda x: -x[1])[:top_k]:</text:span></text:p>
      <text:p text:style-name="Preformatted_20_Text"><text:span text:style-name="Source_20_Text"><text:s text:c="8"/>pct = 100.0 * t / incl_max</text:span></text:p>
      <text:p text:style-name="Preformatted_20_Text"><text:span text:style-name="Source_20_Text"><text:s text:c="8"/>print(f" <text:s/>{path:60s} <text:s/>{t:8.3f}s <text:s/>({pct:5.1f}% of max)")</text:span></text:p>
      <text:p text:style-name="Preformatted_20_Text"/>
      <text:p text:style-name="Preformatted_20_Text"><text:span text:style-name="Source_20_Text"><text:s text:c="4"/># 7️⃣ <text:s/>(Optional) list nodes whose exclusive time &gt; 2× mean</text:span></text:p>
      <text:p text:style-name="Preformatted_20_Text"><text:span text:style-name="Source_20_Text"><text:s text:c="4"/>threshold = 2.0 * excl_mean</text:span></text:p>
      <text:p text:style-name="Preformatted_20_Text"><text:span text:style-name="Source_20_Text"><text:s text:c="4"/>heavy_excl = [(p, t) for p, t in excl_vals if t &gt; threshold]</text:span></text:p>
      <text:p text:style-name="Preformatted_20_Text"><text:span text:style-name="Source_20_Text"><text:s text:c="4"/>if heavy_excl:</text:span></text:p>
      <text:p text:style-name="Preformatted_20_Text"><text:span text:style-name="Source_20_Text"><text:s text:c="8"/>print(f"\nNodes with exclusive time &gt; 2× mean ({excl_mean:.3f}s):")</text:span></text:p>
      <text:p text:style-name="Preformatted_20_Text"><text:span text:style-name="Source_20_Text"><text:s text:c="8"/>for p, t in heavy_excl:</text:span></text:p>
      <text:p text:style-name="Preformatted_20_Text"><text:span text:style-name="Source_20_Text"><text:s text:c="12"/>print(f" <text:s/>{p:60s} <text:s/>{t:.3f}s")</text:span></text:p>
      <text:p text:style-name="Preformatted_20_Text"><text:span text:style-name="Source_20_Text"><text:s text:c="4"/>else:</text:span></text:p>
      <text:p text:style-name="Preformatted_20_Text"><text:span text:style-name="Source_20_Text"><text:s text:c="8"/>print("\nNo exclusive‑time outliers ( &gt; 2× mean ).")</text:span></text:p>
      <text:p text:style-name="Preformatted_20_Text"/>
      <text:p text:style-name="Preformatted_20_Text"><text:span text:style-name="Source_20_Text"># ------------------------------------------------------------------</text:span></text:p>
      <text:p text:style-name="Preformatted_20_Text"><text:span text:style-name="Source_20_Text"># Entry point</text:span></text:p>
      <text:p text:style-name="Preformatted_20_Text"><text:span text:style-name="Source_20_Text"># ------------------------------------------------------------------</text:span></text:p>
      <text:p text:style-name="Preformatted_20_Text"><text:span text:style-name="Source_20_Text">if __name__ == "__main__":</text:span></text:p>
      <text:p text:style-name="Preformatted_20_Text"><text:span text:style-name="Source_20_Text"><text:s text:c="4"/>if len(sys.argv) != 2:</text:span></text:p>
      <text:p text:style-name="Preformatted_20_Text"><text:span text:style-name="Source_20_Text"><text:s text:c="8"/>print(f"Usage: {sys.argv[0]} calltree.json")</text:span></text:p>
      <text:p text:style-name="Preformatted_20_Text"><text:span text:style-name="Source_20_Text"><text:s text:c="8"/>sys.exit(1)</text:span></text:p>
      <text:p text:style-name="Preformatted_20_Text"/>
      <text:p text:style-name="Preformatted_20_Text"><text:span text:style-name="Source_20_Text"><text:s text:c="4"/>json_file = sys.argv[1]</text:span></text:p>
      <text:p text:style-name="Preformatted_20_Text"><text:span text:style-name="Source_20_Text"><text:s text:c="4"/>with open(json_file, "r") as f:</text:span></text:p>
      <text:p text:style-name="Preformatted_20_Text"><text:span text:style-name="Source_20_Text"><text:s text:c="8"/>tree = json.load(f)</text:span></text:p>
      <text:p text:style-name="Preformatted_20_Text"/>
      <text:p text:style-name="P15"><text:span text:style-name="Source_20_Text"><text:s text:c="4"/>analyse(tree, top_k=5)</text:span></text:p>
      <text:h text:style-name="Heading_20_3" text:outline-level="3"><text:soft-page-break/>How to use it</text:h>
      <text:list text:style-name="L26">
        <text:list-item>
          <text:p text:style-name="P85"><text:span text:style-name="Strong_20_Emphasis">Export</text:span> your Cube call‑tree to <text:span text:style-name="Source_20_Text">calltree.json</text:span> (see the schema above). </text:p>
        </text:list-item>
        <text:list-item>
          <text:p text:style-name="P84">Run the script: </text:p>
        </text:list-item>
      </text:list>
      <text:p text:style-name="P15"><text:span text:style-name="Source_20_Text">python3 analyse_imbalance.py calltree.json</text:span></text:p>
      <text:p text:style-name="Text_20_body">You’ll get a short report that tells you:</text:p>
      <text:list text:style-name="L27">
        <text:list-item>
          <text:p text:style-name="P87"><text:span text:style-name="Strong_20_Emphasis">LIF</text:span> for exclusive and inclusive times (the higher the number, the worse the imbalance). </text:p>
        </text:list-item>
        <text:list-item>
          <text:p text:style-name="P87">The <text:span text:style-name="Strong_20_Emphasis">top‑k hot‑spots</text:span> – the call‑paths that dominate the runtime. </text:p>
        </text:list-item>
        <text:list-item>
          <text:p text:style-name="P86">Any <text:span text:style-name="Strong_20_Emphasis">exclusive‑time outliers</text:span> that might indicate a single function that is doing too much work on its own. </text:p>
        </text:list-item>
      </text:list>
      <text:p text:style-name="Horizontal_20_Line"/>
      <text:h text:style-name="Heading_20_2" text:outline-level="2">4. Extending the analysis</text:h>
      <table:table table:name="Table21" table:style-name="Table21">
        <table:table-column table:style-name="Table21.A"/>
        <table:table-column table:style-name="Table21.B"/>
        <table:table-header-rows>
          <table:table-row>
            <table:table-cell table:style-name="Table21.A1" office:value-type="string">
              <text:p text:style-name="Table_20_Heading">What you might want</text:p>
            </table:table-cell>
            <table:table-cell table:style-name="Table21.A1" office:value-type="string">
              <text:p text:style-name="Table_20_Heading">How to add it (quick code sketch)</text:p>
            </table:table-cell>
          </table:table-row>
        </table:table-header-rows>
        <table:table-row>
          <table:table-cell table:style-name="Table21.A1" office:value-type="string">
            <text:p text:style-name="Table_20_Contents"><text:span text:style-name="Strong_20_Emphasis">Per‑process / per‑thread breakdown</text:span></text:p>
          </table:table-cell>
          <table:table-cell table:style-name="Table21.A1" office:value-type="string">
            <text:p text:style-name="Table_20_Contents">Add a <text:span text:style-name="Source_20_Text">resources</text:span> field to each node, e.g. <text:span text:style-name="Source_20_Text">metrics["time_excl_by_rank"] = { "0": 12.3, "1": 10.7 }</text:span>. Then compute LIF per rank.</text:p>
          </table:table-cell>
        </table:table-row>
        <table:table-row>
          <table:table-cell table:style-name="Table21.A1" office:value-type="string">
            <text:p text:style-name="Table_20_Contents"><text:span text:style-name="Strong_20_Emphasis">Percentage of total runtime</text:span></text:p>
          </table:table-cell>
          <table:table-cell table:style-name="Table21.A1" office:value-type="string">
            <text:p text:style-name="Table_20_Contents">After <text:span text:style-name="Source_20_Text">compute_inclusive(tree)</text:span>, store <text:span text:style-name="Source_20_Text">total = tree["metrics"]["time_incl"]</text:span>. In the report, print <text:span text:style-name="Source_20_Text">100 * t / total</text:span>.</text:p>
          </table:table-cell>
        </table:table-row>
        <table:table-row>
          <table:table-cell table:style-name="Table21.A1" office:value-type="string">
            <text:p text:style-name="Table_20_Contents"><text:span text:style-name="Strong_20_Emphasis">Visualization</text:span></text:p>
          </table:table-cell>
          <table:table-cell table:style-name="Table21.A1" office:value-type="string">
            <text:p text:style-name="Table_20_Contents">Use <text:span text:style-name="Source_20_Text">graphviz</text:span> (<text:span text:style-name="Source_20_Text">dot</text:span>) to emit a DOT file where node labels contain <text:span text:style-name="Source_20_Text">incl</text:span> and node colour encodes the imbalance factor.</text:p>
          </table:table-cell>
        </table:table-row>
        <table:table-row>
          <table:table-cell table:style-name="Table21.A1" office:value-type="string">
            <text:p text:style-name="Table_20_Contents"><text:span text:style-name="Strong_20_Emphasis">Automatic suggestion</text:span></text:p>
          </table:table-cell>
          <table:table-cell table:style-name="Table21.A1" office:value-type="string">
            <text:p text:style-name="Table_20_Contents">If a node’s <text:span text:style-name="Source_20_Text">incl</text:span> &gt; 0.2 × total <text:span text:style-name="Emphasis">and</text:span> its <text:span text:style-name="Source_20_Text">excl</text:span> &gt; 2 × mean, flag it as a <text:span text:style-name="Emphasis">candidate for further parallelisation</text:span>.</text:p>
          </table:table-cell>
        </table:table-row>
        <table:table-row>
          <table:table-cell table:style-name="Table21.A1" office:value-type="string">
            <text:p text:style-name="Table_20_Contents"><text:span text:style-name="Strong_20_Emphasis">Recursive depth detection</text:span></text:p>
          </table:table-cell>
          <table:table-cell table:style-name="Table21.A1" office:value-type="string">
            <text:p text:style-name="Table_20_Contents">Add a <text:span text:style-name="Source_20_Text">depth</text:span> field while flattening (<text:span text:style-name="Source_20_Text">depth = len(path.split('/'))</text:span>). Plot <text:span text:style-name="Source_20_Text">incl</text:span> vs. depth to see whether deeper recursion levels cause the imbalance.</text:p>
          </table:table-cell>
        </table:table-row>
      </table:table>
      <text:p text:style-name="Horizontal_20_Line"/>
      <text:h text:style-name="Heading_20_2" text:outline-level="2">5. Do you really need JSON?</text:h>
      <text:list text:style-name="L28">
        <text:list-item>
          <text:p text:style-name="P88"><text:span text:style-name="Strong_20_Emphasis">No, JSON is just a convenient </text:span><text:span text:style-name="Strong_20_Emphasis"><text:span text:style-name="Emphasis">serialization</text:span></text:span><text:span text:style-name="Strong_20_Emphasis"> format.</text:span><text:line-break/><text:span text:style-name="Emphasis">If you already have the data in another representation (e.g., a C++ </text:span><text:span text:style-name="Emphasis"><text:span text:style-name="Source_20_Text">std::vector&lt;Cnode*&gt;</text:span></text:span><text:span text:style-name="Emphasis">, an HDF5 dataset, a SQLite table, or even plain text), you can adapt the same algorithm:</text:span> </text:p>
        </text:list-item>
      </text:list>
      <text:p text:style-name="P5"><text:span text:style-name="Source_20_Text">// Pseudo‑C++ version (using libcube)</text:span></text:p>
      <text:p text:style-name="P10"><text:span text:style-name="Source_20_Text">void walk(const cube::Cnode* node, double&amp; total_incl,</text:span></text:p>
      <text:p text:style-name="P10"><text:span text:style-name="Source_20_Text"><text:s text:c="10"/>std::vector&lt;double&gt;&amp; exclVals, std::vector&lt;double&gt;&amp; inclVals) {</text:span></text:p>
      <text:p text:style-name="P10"><text:span text:style-name="Source_20_Text"><text:s text:c="4"/>double excl = node-&gt;get_excl(metric);</text:span></text:p>
      <text:p text:style-name="P10"><text:span text:style-name="Source_20_Text"><text:s text:c="4"/>double incl = excl;</text:span></text:p>
      <text:p text:style-name="P10"><text:span text:style-name="Source_20_Text"><text:s text:c="4"/>for (auto child : node-&gt;get_children())</text:span></text:p>
      <text:p text:style-name="P10"><text:span text:style-name="Source_20_Text"><text:s text:c="8"/>incl += walk(child, total_incl, exclVals, inclVals);</text:span></text:p>
      <text:p text:style-name="P10"><text:span text:style-name="Source_20_Text"><text:s text:c="4"/>exclVals.push_back(excl);</text:span></text:p>
      <text:p text:style-name="P10"><text:span text:style-name="Source_20_Text"><text:s text:c="4"/>inclVals.push_back(incl);</text:span></text:p>
      <text:p text:style-name="P10"><text:span text:style-name="Source_20_Text"><text:s text:c="4"/>total_incl += incl; <text:s text:c="2"/>// only for the root</text:span></text:p>
      <text:p text:style-name="P10"><text:span text:style-name="Source_20_Text"><text:s text:c="4"/>return incl;</text:span></text:p>
      <text:p text:style-name="P13"><text:span text:style-name="Source_20_Text">}</text:span></text:p>
      <text:p text:style-name="P12"><text:soft-page-break/>The <text:span text:style-name="Strong_20_Emphasis">logic</text:span> (post‑order traversal, accumulate exclusive → inclusive, compute mean/max, LIF) stays identical regardless of the container you use.</text:p>
      <text:p text:style-name="P9"/>
      <text:h text:style-name="P6" text:outline-level="2">6. TL;DR checklist for you</text:h>
      <table:table table:name="Table22" table:style-name="Table22">
        <table:table-column table:style-name="Table22.A"/>
        <table:table-column table:style-name="Table22.B"/>
        <table:table-header-rows>
          <table:table-row>
            <table:table-cell table:style-name="Table22.A1" office:value-type="string">
              <text:p text:style-name="Table_20_Heading">✅</text:p>
            </table:table-cell>
            <table:table-cell table:style-name="Table22.A1" office:value-type="string">
              <text:p text:style-name="Table_20_Heading">Action</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Export the call‑tree (any hierarchical format – JSON is easy to read/write).</text:p>
          </table:table-cell>
        </table:table-row>
        <table:table-row>
          <table:table-cell table:style-name="Table22.A1" office:value-type="string">
            <text:p text:style-name="Table_20_Contents">2</text:p>
          </table:table-cell>
          <table:table-cell table:style-name="Table22.A1" office:value-type="string">
            <text:p text:style-name="Table_20_Contents">Make sure each node stores at least <text:span text:style-name="Strong_20_Emphasis">exclusive</text:span> time (and optionally inclusive).</text:p>
          </table:table-cell>
        </table:table-row>
        <table:table-row>
          <table:table-cell table:style-name="Table22.A1" office:value-type="string">
            <text:p text:style-name="Table_20_Contents">3</text:p>
          </table:table-cell>
          <table:table-cell table:style-name="Table22.A1" office:value-type="string">
            <text:p text:style-name="Table_20_Contents">If inclusive is missing, compute it with a <text:span text:style-name="Strong_20_Emphasis">post‑order walk</text:span> (children first, then parent).</text:p>
          </table:table-cell>
        </table:table-row>
        <table:table-row>
          <table:table-cell table:style-name="Table22.A1" office:value-type="string">
            <text:p text:style-name="Table_20_Contents">4</text:p>
          </table:table-cell>
          <table:table-cell table:style-name="Table22.A1" office:value-type="string">
            <text:p text:style-name="Table_20_Contents">Compute <text:span text:style-name="Strong_20_Emphasis">mean</text:span>, <text:span text:style-name="Strong_20_Emphasis">max</text:span>, and <text:span text:style-name="Strong_20_Emphasis">LIF = max / mean</text:span> for both exclusive and inclusive times.</text:p>
          </table:table-cell>
        </table:table-row>
        <table:table-row>
          <table:table-cell table:style-name="Table22.A1" office:value-type="string">
            <text:p text:style-name="Table_20_Contents">5</text:p>
          </table:table-cell>
          <table:table-cell table:style-name="Table22.A1" office:value-type="string">
            <text:p text:style-name="Table_20_Contents">Report the nodes that contribute most to the max (top‑k hot‑spots) – those are your imbalance candidates.</text:p>
          </table:table-cell>
        </table:table-row>
        <table:table-row>
          <table:table-cell table:style-name="Table22.A1" office:value-type="string">
            <text:p text:style-name="Table_20_Contents">6</text:p>
          </table:table-cell>
          <table:table-cell table:style-name="Table22.A1" office:value-type="string">
            <text:p text:style-name="Table_20_Contents">(Optional) add per‑resource breakdowns, visualisation, or automatic “suggestion” rules.</text:p>
          </table:table-cell>
        </table:table-row>
      </table:table>
      <text:p text:style-name="P12">If you give me a <text:span text:style-name="Strong_20_Emphasis">small snippet</text:span> of your actual JSON (or the equivalent data structure), I can point out exactly how the script would access the fields you have, or even generate a language‑specific version that fits your workflow. Feel free to paste a few lines!</text:p>
      <text:p text:style-name="P21">im trying to see if llm can organize and tell me where there's load imbalance. </text:p>
      <text:list text:style-name="L29">
        <text:list-item>
          <text:p text:style-name="P36">im using cubegui andd want to know if you can tell me where there's a load imbalance </text:p>
        </text:list-item>
        <text:list-item>
          <text:p text:style-name="P37">How can i fix it? </text:p>
        </text:list-item>
      </text:list>
      <text:p text:style-name="P22">Metric tree:<text:line-break/>0.00000214 Minimum Inclusive Time (sec) </text:p>
      <text:p text:style-name="P22">Call tree:<text:line-break/>6.25909091 larger<text:line-break/>6.25885500 int main(int, char**)<text:line-break/>0.64534174 MPI_Init<text:line-break/>0.00000736 MPI_Comm_rank<text:line-break/>0.00000214 MPI_Comm_size<text:line-break/>0.02310698 long long int heavy_work(long long int)<text:line-break/>0.00001201 MPI_Reduce<text:line-break/>0.00010179 MPI_Finalize</text:p>
      <text:p text:style-name="P22">System tree: </text:p>
      <text:list text:style-name="L30">
        <text:list-item>
          <text:p text:style-name="P38">machine Linux</text:p>
          <text:list>
            <text:list-item>
              <text:p text:style-name="P39">node aashika<text:line-break/>5.61314975 MPI Rank 0<text:line-break/>0.02626877 MPI Rank 1<text:line-break/>0.02627667 MPI Rank 2<text:line-break/>0.02310698 MPI Rank 3 </text:p>
            </text:list-item>
          </text:list>
        </text:list-item>
      </text:list>
      <text:p text:style-name="P2"><text:soft-page-break/>Below is a <text:span text:style-name="Strong_20_Emphasis">step‑by‑step diagnosis</text:span> of the numbers you posted, a <text:span text:style-name="Strong_20_Emphasis">quick guide to spotting the same pattern inside CubeGUI</text:span>, and a <text:span text:style-name="Strong_20_Emphasis">set of concrete actions</text:span> you can take to eliminate the imbalance.</text:p>
      <text:p text:style-name="P9"/>
      <text:h text:style-name="P6" text:outline-level="2">1. What the numbers tell u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Tree level</text:p>
            </table:table-cell>
            <table:table-cell table:style-name="Table23.A1" office:value-type="string">
              <text:p text:style-name="Table_20_Heading">Inclusive time (sec)</text:p>
            </table:table-cell>
            <table:table-cell table:style-name="Table23.A1" office:value-type="string">
              <text:p text:style-name="Table_20_Heading">Interpretation</text:p>
            </table:table-cell>
          </table:table-row>
        </table:table-header-rows>
        <table:table-row>
          <table:table-cell table:style-name="Table23.A1" office:value-type="string">
            <text:p text:style-name="Table_20_Contents"><text:span text:style-name="Strong_20_Emphasis">Root (total program)</text:span></text:p>
          </table:table-cell>
          <table:table-cell table:style-name="Table23.A1" office:value-type="string">
            <text:p text:style-name="Table_20_Contents"><text:span text:style-name="Strong_20_Emphasis">6.25909091</text:span></text:p>
          </table:table-cell>
          <table:table-cell table:style-name="Table23.A1" office:value-type="string">
            <text:p text:style-name="Table_20_Contents">Whole run time (the “larger” label you see in the call‑tree).</text:p>
          </table:table-cell>
        </table:table-row>
        <table:table-row>
          <table:table-cell table:style-name="Table23.A1" office:value-type="string">
            <text:p text:style-name="Table_20_Contents"><text:span text:style-name="Strong_20_Emphasis">int main</text:span></text:p>
          </table:table-cell>
          <table:table-cell table:style-name="Table23.A1" office:value-type="string">
            <text:p text:style-name="Table_20_Contents">6.25885500</text:p>
          </table:table-cell>
          <table:table-cell table:style-name="Table23.A1" office:value-type="string">
            <text:p text:style-name="Table_20_Contents">Almost all the time is spent inside <text:span text:style-name="Source_20_Text">main</text:span>.</text:p>
          </table:table-cell>
        </table:table-row>
        <table:table-row>
          <table:table-cell table:style-name="Table23.A1" office:value-type="string">
            <text:p text:style-name="Table_20_Contents"><text:span text:style-name="Strong_20_Emphasis">MPI_Init</text:span></text:p>
          </table:table-cell>
          <table:table-cell table:style-name="Table23.A1" office:value-type="string">
            <text:p text:style-name="Table_20_Contents">0.64534174</text:p>
          </table:table-cell>
          <table:table-cell table:style-name="Table23.A1" office:value-type="string">
            <text:p text:style-name="Table_20_Contents">Startup cost – fine, not the culprit.</text:p>
          </table:table-cell>
        </table:table-row>
        <table:table-row>
          <table:table-cell table:style-name="Table23.A1" office:value-type="string">
            <text:p text:style-name="Table_20_Contents"><text:span text:style-name="Strong_20_Emphasis">long long int heavy_work(long long int)</text:span></text:p>
          </table:table-cell>
          <table:table-cell table:style-name="Table23.A1" office:value-type="string">
            <text:p text:style-name="Table_20_Contents"><text:span text:style-name="Strong_20_Emphasis">0.02310698</text:span></text:p>
          </table:table-cell>
          <table:table-cell table:style-name="Table23.A1" office:value-type="string">
            <text:p text:style-name="Table_20_Contents">This is the <text:span text:style-name="Emphasis">only</text:span> user‑code region that does any work beyond the MPI boiler‑plate.</text:p>
          </table:table-cell>
        </table:table-row>
        <table:table-row>
          <table:table-cell table:style-name="Table23.A1" office:value-type="string">
            <text:p text:style-name="Table_20_Contents"><text:span text:style-name="Strong_20_Emphasis">System tree – per rank</text:span></text:p>
          </table:table-cell>
          <table:table-cell table:style-name="Table23.A1" office:value-type="string">
            <text:p text:style-name="Table_20_Contents">5.61314975 (Rank 0) vs. ~0.026 s (Ranks 1‑3)</text:p>
          </table:table-cell>
          <table:table-cell table:style-name="Table23.A1" office:value-type="string">
            <text:p text:style-name="Table_20_Contents"><text:span text:style-name="Strong_20_Emphasis">&gt; 99 % of the total time is on rank 0</text:span>. All other ranks are idle for almost the whole execution.</text:p>
          </table:table-cell>
        </table:table-row>
      </table:table>
      <text:p text:style-name="P11"><text:span text:style-name="Strong_20_Emphasis">Bottom line:</text:span> The program is <text:span text:style-name="Strong_20_Emphasis">load‑imbalanced at the MPI‑process level</text:span>. Rank 0 is doing the heavy work while the other three ranks spend almost nothing but waiting (most likely inside the <text:span text:style-name="Source_20_Text">MPI_Reduce</text:span> that gathers the result).</text:p>
      <text:p text:style-name="P12">The metric you selected – <text:span text:style-name="Emphasis">Minimum Inclusive Time</text:span> – is not the one that reveals the imbalance; it simply reports the smallest non‑zero inclusive time (2 µs) for the whole run. To see the imbalance you must look at a <text:span text:style-name="Strong_20_Emphasis">per‑process metric</text:span> (e.g. <text:span text:style-name="Emphasis">Inclusive Time</text:span> <text:span text:style-name="Strong_20_Emphasis">per MPI rank</text:span>) and then compute the <text:span text:style-name="Strong_20_Emphasis">max/min</text:span> or <text:span text:style-name="Strong_20_Emphasis">standard deviation</text:span> across ranks.</text:p>
      <text:p text:style-name="P9"/>
      <text:h text:style-name="P6" text:outline-level="2">2. How to see the same thing in CubeGUI</text:h>
      <text:list text:style-name="L31">
        <text:list-item>
          <text:p text:style-name="P71"><text:span text:style-name="Strong_20_Emphasis">Open the .cube file</text:span> → the <text:span text:style-name="Emphasis">Tree</text:span> tab shows the call‑tree you posted. </text:p>
        </text:list-item>
        <text:list-item>
          <text:p text:style-name="P71"><text:span text:style-name="Strong_20_Emphasis">Select a metric that is summed over processes</text:span>, e.g. <text:span text:style-name="Strong_20_Emphasis">“Inclusive Time (sec)”</text:span> (or “Time (incl.)”). </text:p>
        </text:list-item>
        <text:list-item>
          <text:p text:style-name="P71"><text:span text:style-name="Strong_20_Emphasis">Open the </text:span><text:span text:style-name="Strong_20_Emphasis"><text:span text:style-name="Emphasis">System Tree</text:span></text:span><text:span text:style-name="Strong_20_Emphasis"> pane</text:span> (the left‑hand column with “machine → node → MPI Rank …”). </text:p>
        </text:list-item>
        <text:list-item>
          <text:p text:style-name="P71"><text:span text:style-name="Strong_20_Emphasis">Right‑click → “Show metric per system node”</text:span> (or simply click the column header “Inclusive Time”). CubeGUI will now display the inclusive time <text:span text:style-name="Emphasis">for each rank</text:span> next to the rank name. </text:p>
        </text:list-item>
        <text:list-item>
          <text:p text:style-name="P71"><text:span text:style-name="Strong_20_Emphasis">Sort the system‑node column</text:span> by clicking the header – you will see Rank 0 far to the right (largest value) and the others clustered at the left (tiny values). </text:p>
        </text:list-item>
        <text:list-item>
          <text:p text:style-name="P72"><text:span text:style-name="Strong_20_Emphasis">Optional: use the “Flame Graph” view</text:span> (View → Flame Graph). The width of each bar is proportional to the inclusive time of that rank; you will instantly recognise a huge bar for Rank 0 and almost invisible bars for the rest. </text:p>
        </text:list-item>
      </text:list>
      <text:p text:style-name="P12">If you want a numeric imbalance factor, CubeGUI can compute it for you:</text:p>
      <text:p text:style-name="P12"><text:span text:style-name="Emphasis">Select the rank node → “Statistics” → it prints </text:span><text:span text:style-name="Emphasis"><text:span text:style-name="Strong_20_Emphasis">Mean</text:span></text:span><text:span text:style-name="Emphasis">, </text:span><text:span text:style-name="Emphasis"><text:span text:style-name="Strong_20_Emphasis">Maximum</text:span></text:span><text:span text:style-name="Emphasis">, </text:span><text:span text:style-name="Emphasis"><text:span text:style-name="Strong_20_Emphasis">Minimum</text:span></text:span><text:span text:style-name="Emphasis">, and </text:span><text:span text:style-name="Emphasis"><text:span text:style-name="Strong_20_Emphasis">Load‑Imbalance Factor = max/mean</text:span></text:span>. In your case the factor is roughly <text:span text:style-name="Source_20_Text">5.613 / 0.026 ≈ 215</text:span>. Anything &gt; 2‑3 is already a problem; &gt; 10 is a severe imbalance.</text:p>
      <text:p text:style-name="P9"><text:soft-page-break/></text:p>
      <text:h text:style-name="P6" text:outline-level="2">3. Why the imbalance exists (most likely)</text:h>
      <table:table table:name="Table24" table:style-name="Table24">
        <table:table-column table:style-name="Table24.A"/>
        <table:table-column table:style-name="Table24.B"/>
        <table:table-header-rows>
          <table:table-row>
            <table:table-cell table:style-name="Table24.A1" office:value-type="string">
              <text:p text:style-name="Table_20_Heading">Observation</text:p>
            </table:table-cell>
            <table:table-cell table:style-name="Table24.A1" office:value-type="string">
              <text:p text:style-name="Table_20_Heading">Typical cause</text:p>
            </table:table-cell>
          </table:table-row>
        </table:table-header-rows>
        <table:table-row>
          <table:table-cell table:style-name="Table24.A1" office:value-type="string">
            <text:p text:style-name="Table_20_Contents">Only one rank spends time in <text:span text:style-name="Source_20_Text">heavy_work</text:span></text:p>
          </table:table-cell>
          <table:table-cell table:style-name="Table24.A1" office:value-type="string">
            <text:p text:style-name="Table_20_Contents"><text:span text:style-name="Strong_20_Emphasis">Work is not partitioned</text:span> – the function is called only on Rank 0 (perhaps inside an <text:span text:style-name="Source_20_Text">if (rank==0)</text:span> block).</text:p>
          </table:table-cell>
        </table:table-row>
        <table:table-row>
          <table:table-cell table:style-name="Table24.A1" office:value-type="string">
            <text:p text:style-name="Table_20_Contents">All other ranks have the same tiny time (≈ 0.026 s)</text:p>
          </table:table-cell>
          <table:table-cell table:style-name="Table24.A1" office:value-type="string">
            <text:p text:style-name="Table_20_Contents">They are <text:span text:style-name="Strong_20_Emphasis">waiting in the collective</text:span> (<text:span text:style-name="Source_20_Text">MPI_Reduce</text:span>) for Rank 0 to finish.</text:p>
          </table:table-cell>
        </table:table-row>
        <table:table-row>
          <table:table-cell table:style-name="Table24.A1" office:value-type="string">
            <text:p text:style-name="Table_20_Contents">No OpenMP/Threading reported inside <text:span text:style-name="Source_20_Text">heavy_work</text:span></text:p>
          </table:table-cell>
          <table:table-cell table:style-name="Table24.A1" office:value-type="string">
            <text:p text:style-name="Table_20_Contents">The heavy computation is <text:span text:style-name="Strong_20_Emphasis">sequential</text:span> inside that rank.</text:p>
          </table:table-cell>
        </table:table-row>
      </table:table>
      <text:p text:style-name="P12">If <text:span text:style-name="Source_20_Text">heavy_work</text:span> is supposed to process a data set that can be split, the current code is simply <text:span text:style-name="Strong_20_Emphasis">serialising the whole workload on a single process</text:span>.</text:p>
      <text:p text:style-name="P9"/>
      <text:h text:style-name="P6" text:outline-level="2">4. How to fix the imbalance</text:h>
      <text:p text:style-name="P12">Below are three “levels” of remediation. Choose the one that matches your algorithmic constraints and the effort you are willing to invest.</text:p>
      <text:h text:style-name="P7" text:outline-level="3">4.1. Data‑parallel redistribution (the usual solution)</text:h>
      <text:list text:style-name="L32">
        <text:list-item>
          <text:p text:style-name="P73"><text:span text:style-name="Strong_20_Emphasis">Split the input data</text:span> into <text:span text:style-name="Emphasis">N</text:span> (here 4) chunks, one per MPI rank. </text:p>
        </text:list-item>
        <text:list-item>
          <text:p text:style-name="P73"><text:span text:style-name="Strong_20_Emphasis">Replace the </text:span><text:span text:style-name="Strong_20_Emphasis"><text:span text:style-name="Source_20_Text">if (rank==0) heavy_work(...);</text:span></text:span> with a call on <text:span text:style-name="Strong_20_Emphasis">every rank</text:span>:</text:p>
        </text:list-item>
      </text:list>
      <text:list text:style-name="L33">
        <text:list-item>
          <text:p text:style-name="P31"><text:span text:style-name="Source_20_Text">// Example pseudo‑code</text:span></text:p>
        </text:list-item>
      </text:list>
      <text:p text:style-name="Preformatted_20_Text"><text:span text:style-name="Source_20_Text">long long int local_n = global_n / size; <text:s text:c="9"/>// size = number of ranks</text:span></text:p>
      <text:p text:style-name="Preformatted_20_Text"><text:span text:style-name="Source_20_Text">long long int my_start = rank * local_n;</text:span></text:p>
      <text:p text:style-name="P15"><text:span text:style-name="Source_20_Text">long long int my_result = heavy_work(my_start, local_n);</text:span></text:p>
      <text:list text:style-name="L34">
        <text:list-item>
          <text:p text:style-name="P89"><text:span text:style-name="Strong_20_Emphasis">Collect the partial results</text:span> with a <text:span text:style-name="Emphasis">reduce</text:span> (or better, an <text:span text:style-name="Emphasis">all‑reduce</text:span> if every rank needs the final answer). </text:p>
        </text:list-item>
      </text:list>
      <text:list text:style-name="L35">
        <text:list-item text:start-value="3">
          <text:p text:style-name="P32"><text:span text:style-name="Source_20_Text">long long int global_result;</text:span></text:p>
          <text:p text:style-name="P33"><text:span text:style-name="Source_20_Text">MPI_Allreduce(&amp;my_result, &amp;global_result, 1, MPI_LONG_LONG, MPI_SUM, MPI_COMM_WORLD);</text:span></text:p>
          <text:p text:style-name="P90"><text:span text:style-name="Emphasis">Why </text:span><text:span text:style-name="Emphasis"><text:span text:style-name="Source_20_Text">Allreduce</text:span></text:span><text:span text:style-name="Emphasis">?</text:span> It eliminates the “master‑only” waiting pattern – every rank participates in the reduction and can continue immediately after it finishes.</text:p>
        </text:list-item>
        <text:list-item>
          <text:p text:style-name="P90"><text:span text:style-name="Strong_20_Emphasis">Re‑run and verify</text:span> the per‑rank times become roughly equal (± 10 % is usually acceptable).</text:p>
        </text:list-item>
      </text:list>
      <text:h text:style-name="Heading_20_3" text:outline-level="3">4.2. Dynamic load balancing (if the work per element is unpredictable)</text:h>
      <text:p text:style-name="Text_20_body">If the amount of work per data element varies wildly (e.g., irregular mesh, adaptive algorithm), a <text:span text:style-name="Strong_20_Emphasis">static partition</text:span> may still leave some ranks idle. In that case:</text:p>
      <table:table table:name="Table25" table:style-name="Table25">
        <table:table-column table:style-name="Table25.A"/>
        <table:table-column table:style-name="Table25.B"/>
        <table:table-header-rows>
          <table:table-row>
            <table:table-cell table:style-name="Table25.A1" office:value-type="string">
              <text:p text:style-name="Table_20_Heading">Technique</text:p>
            </table:table-cell>
            <table:table-cell table:style-name="Table25.A1" office:value-type="string">
              <text:p text:style-name="Table_20_Heading">How to apply in an MPI program</text:p>
            </table:table-cell>
          </table:table-row>
        </table:table-header-rows>
        <table:table-row>
          <table:table-cell table:style-name="Table25.A1" office:value-type="string">
            <text:p text:style-name="Table_20_Contents"><text:span text:style-name="Strong_20_Emphasis">Work‑stealing loop</text:span></text:p>
          </table:table-cell>
          <table:table-cell table:style-name="Table25.A1" office:value-type="string">
            <text:p text:style-name="Table_20_Contents">Each rank repeatedly calls <text:span text:style-name="Source_20_Text">MPI_Irecv</text:span> for a <text:span text:style-name="Emphasis">task description</text:span> (e.g., an index range). When a rank finishes its own chunk it sends a request (<text:span text:style-name="Source_20_Text">MPI_Send</text:span>) to any rank that still has work.</text:p>
          </table:table-cell>
        </table:table-row>
        <text:soft-page-break/>
        <table:table-row>
          <table:table-cell table:style-name="Table25.A1" office:value-type="string">
            <text:p text:style-name="Table_20_Contents"><text:span text:style-name="Strong_20_Emphasis">Master‑worker pattern</text:span></text:p>
          </table:table-cell>
          <table:table-cell table:style-name="Table25.A1" office:value-type="string">
            <text:p text:style-name="Table_20_Contents">Rank 0 holds a queue of tasks. Workers (<text:span text:style-name="Source_20_Text">rank&gt;0</text:span>) repeatedly call <text:span text:style-name="Source_20_Text">MPI_Recv</text:span> for a task, compute, then <text:span text:style-name="Source_20_Text">MPI_Send</text:span> the result back. The master distributes new tasks until the queue is empty.</text:p>
          </table:table-cell>
        </table:table-row>
        <table:table-row>
          <table:table-cell table:style-name="Table25.A1" office:value-type="string">
            <text:p text:style-name="Table_20_Contents"><text:span text:style-name="Strong_20_Emphasis">Hybrid MPI+OpenMP</text:span></text:p>
          </table:table-cell>
          <table:table-cell table:style-name="Table25.A1" office:value-type="string">
            <text:p text:style-name="Table_20_Contents">Keep the MPI distribution coarse (e.g., one sub‑domain per rank) and inside each rank use OpenMP <text:span text:style-name="Source_20_Text">#pragma omp parallel for schedule(dynamic)</text:span> to balance within the node.</text:p>
          </table:table-cell>
        </table:table-row>
      </table:table>
      <text:p text:style-name="Text_20_body">CubeGUI can help you <text:span text:style-name="Strong_20_Emphasis">spot the remaining imbalance</text:span> after you implement a dynamic scheme – simply look at the <text:span text:style-name="Emphasis">standard deviation</text:span> of the per‑rank inclusive times; it should drop dramatically.</text:p>
      <text:h text:style-name="Heading_20_3" text:outline-level="3">4.3. Overlap communication and computation</text:h>
      <text:p text:style-name="Text_20_body">Even with a perfect data split, you may still see a “spike” at the <text:span text:style-name="Source_20_Text">MPI_Reduce</text:span> if the reduction is a <text:span text:style-name="Emphasis">blocking</text:span> collective. To hide that latency:</text:p>
      <text:p text:style-name="Preformatted_20_Text"><text:span text:style-name="Source_20_Text">MPI_Request req;</text:span></text:p>
      <text:p text:style-name="Preformatted_20_Text"><text:span text:style-name="Source_20_Text">MPI_Ireduce(&amp;my_result, &amp;tmp, 1, MPI_LONG_LONG, MPI_SUM, 0, MPI_COMM_WORLD, &amp;req);</text:span></text:p>
      <text:p text:style-name="Preformatted_20_Text"/>
      <text:p text:style-name="Preformatted_20_Text"><text:span text:style-name="Source_20_Text">/* do some independent work here while the reduction progresses */</text:span></text:p>
      <text:p text:style-name="Preformatted_20_Text"><text:span text:style-name="Source_20_Text">do_other_stuff();</text:span></text:p>
      <text:p text:style-name="Preformatted_20_Text"/>
      <text:p text:style-name="Preformatted_20_Text"><text:span text:style-name="Source_20_Text">/* now wait for the reduction to finish */</text:span></text:p>
      <text:p text:style-name="P15"><text:span text:style-name="Source_20_Text">MPI_Wait(&amp;req, MPI_STATUS_IGNORE);</text:span></text:p>
      <text:p text:style-name="Text_20_body">If <text:span text:style-name="Source_20_Text">heavy_work</text:span> itself contains internal communication, replace the blocking calls with their non‑blocking counterparts (<text:span text:style-name="Source_20_Text">MPI_Isend</text:span>, <text:span text:style-name="Source_20_Text">MPI_Irecv</text:span>) and progress the MPI engine while you compute.</text:p>
      <text:h text:style-name="Heading_20_3" text:outline-level="3">4.4. Algorithmic redesign (when the work cannot be partitioned)</text:h>
      <text:p text:style-name="Text_20_body">Sometimes the algorithm is inherently <text:span text:style-name="Emphasis">serial</text:span> (e.g., a global convergence loop that depends on the result of the previous iteration). In those cases you have to:</text:p>
      <text:list text:style-name="L36">
        <text:list-item>
          <text:p text:style-name="P92"><text:span text:style-name="Strong_20_Emphasis">Re‑examine the mathematical formulation</text:span> – can you use a <text:span text:style-name="Emphasis">parallel reduction</text:span> (e.g., parallel prefix, all‑reduce) instead of a single‑rank reduction? </text:p>
        </text:list-item>
        <text:list-item>
          <text:p text:style-name="P92"><text:span text:style-name="Strong_20_Emphasis">Introduce a hierarchical reduction</text:span> – first reduce within each node, then across nodes – to reduce the amount of data each rank must wait for. </text:p>
        </text:list-item>
        <text:list-item>
          <text:p text:style-name="P91"><text:span text:style-name="Strong_20_Emphasis">Exploit task‑parallelism</text:span> – break the algorithm into independent tasks (e.g., different time steps, different frequency bands) that can be processed concurrently. </text:p>
        </text:list-item>
      </text:list>
      <text:p text:style-name="Horizontal_20_Line"/>
      <text:h text:style-name="Heading_20_2" text:outline-level="2">5. Quick “check‑list” you can run inside CubeGUI</text:h>
      <table:table table:name="Table26" table:style-name="Table26">
        <table:table-column table:style-name="Table26.A"/>
        <table:table-column table:style-name="Table26.B"/>
        <table:table-header-rows>
          <table:table-row>
            <table:table-cell table:style-name="Table26.A1" office:value-type="string">
              <text:p text:style-name="Table_20_Heading">✅</text:p>
            </table:table-cell>
            <table:table-cell table:style-name="Table26.A1" office:value-type="string">
              <text:p text:style-name="Table_20_Heading">What to look for</text:p>
            </table:table-cell>
          </table:table-row>
        </table:table-header-rows>
        <table:table-row>
          <table:table-cell table:style-name="Table26.A1" office:value-type="string">
            <text:p text:style-name="Table_20_Contents"><text:span text:style-name="Strong_20_Emphasis">Metric → Inclusive Time (sec)</text:span> per rank</text:p>
          </table:table-cell>
          <table:table-cell table:style-name="Table26.A1" office:value-type="string">
            <text:p text:style-name="Table_20_Contents">Should be <text:span text:style-name="Emphasis">roughly equal</text:span> (max/min ratio &lt; 2 for a well‑balanced code).</text:p>
          </table:table-cell>
        </table:table-row>
        <table:table-row>
          <table:table-cell table:style-name="Table26.A1" office:value-type="string">
            <text:p text:style-name="Table_20_Contents"><text:span text:style-name="Strong_20_Emphasis">Call tree → heavy_work</text:span></text:p>
          </table:table-cell>
          <table:table-cell table:style-name="Table26.A1" office:value-type="string">
            <text:p text:style-name="Table_20_Contents">Its inclusive time should be <text:span text:style-name="Emphasis">distributed</text:span> across all ranks (or the sum of per‑rank times should equal the total).</text:p>
          </table:table-cell>
        </table:table-row>
        <table:table-row>
          <table:table-cell table:style-name="Table26.A1" office:value-type="string">
            <text:p text:style-name="Table_20_Contents"><text:span text:style-name="Strong_20_Emphasis">System tree → MPI_Reduce</text:span></text:p>
          </table:table-cell>
          <table:table-cell table:style-name="Table26.A1" office:value-type="string">
            <text:p text:style-name="Table_20_Contents">If the inclusive time for the reduction is comparable to the total runtime, the reduction is the bottleneck.</text:p>
          </table:table-cell>
        </table:table-row>
        <text:soft-page-break/>
        <table:table-row>
          <table:table-cell table:style-name="Table26.A1" office:value-type="string">
            <text:p text:style-name="Table_20_Contents"><text:span text:style-name="Strong_20_Emphasis">Flame graph</text:span></text:p>
          </table:table-cell>
          <table:table-cell table:style-name="Table26.A1" office:value-type="string">
            <text:p text:style-name="Table_20_Contents">A single wide bar for one rank indicates the hot‑spot; after fixing, the flame graph should show many bars of similar width.</text:p>
          </table:table-cell>
        </table:table-row>
        <table:table-row>
          <table:table-cell table:style-name="Table26.A1" office:value-type="string">
            <text:p text:style-name="Table_20_Contents"><text:span text:style-name="Strong_20_Emphasis">Statistics → Load‑Imbalance Factor</text:span></text:p>
          </table:table-cell>
          <table:table-cell table:style-name="Table26.A1" office:value-type="string">
            <text:p text:style-name="Table_20_Contents">Aim for a value close to <text:span text:style-name="Strong_20_Emphasis">1.0</text:span>. Anything above <text:span text:style-name="Strong_20_Emphasis">1.5</text:span> suggests you should revisit the partitioning.</text:p>
          </table:table-cell>
        </table:table-row>
      </table:table>
      <text:p text:style-name="Horizontal_20_Line"/>
      <text:h text:style-name="Heading_20_2" text:outline-level="2">6. Putting it all together – an example fix</text:h>
      <text:p text:style-name="Text_20_body">Below is a <text:span text:style-name="Strong_20_Emphasis">minimal, self‑contained example</text:span> that transforms a rank‑0‑only <text:span text:style-name="Source_20_Text">heavy_work</text:span> into a balanced version. Replace your current <text:span text:style-name="Source_20_Text">main</text:span> with something like this (C++/C style, MPI‑C API):</text:p>
      <text:p text:style-name="Preformatted_20_Text"><text:span text:style-name="Source_20_Text">#include &lt;mpi.h&gt;</text:span></text:p>
      <text:p text:style-name="Preformatted_20_Text"><text:span text:style-name="Source_20_Text">#include &lt;stdio.h&gt;</text:span></text:p>
      <text:p text:style-name="Preformatted_20_Text"/>
      <text:p text:style-name="Preformatted_20_Text"><text:span text:style-name="Source_20_Text">long long int heavy_work(long long int start, long long int len)</text:span></text:p>
      <text:p text:style-name="Preformatted_20_Text"><text:span text:style-name="Source_20_Text">{</text:span></text:p>
      <text:p text:style-name="Preformatted_20_Text"><text:span text:style-name="Source_20_Text"><text:s text:c="4"/>long long int sum = 0;</text:span></text:p>
      <text:p text:style-name="Preformatted_20_Text"><text:span text:style-name="Source_20_Text"><text:s text:c="4"/>for (long long int i = start; i &lt; start + len; ++i)</text:span></text:p>
      <text:p text:style-name="Preformatted_20_Text"><text:span text:style-name="Source_20_Text"><text:s text:c="8"/>sum += i; <text:s text:c="20"/>// dummy work – replace with your real code</text:span></text:p>
      <text:p text:style-name="Preformatted_20_Text"><text:span text:style-name="Source_20_Text"><text:s text:c="4"/>return sum;</text:span></text:p>
      <text:p text:style-name="Preformatted_20_Text"><text:span text:style-name="Source_20_Text">}</text:span></text:p>
      <text:p text:style-name="Preformatted_20_Text"/>
      <text:p text:style-name="Preformatted_20_Text"><text:span text:style-name="Source_20_Text">int main(int argc, char **argv)</text:span></text:p>
      <text:p text:style-name="Preformatted_20_Text"><text:span text:style-name="Source_20_Text">{</text:span></text:p>
      <text:p text:style-name="Preformatted_20_Text"><text:span text:style-name="Source_20_Text"><text:s text:c="4"/>MPI_Init(&amp;argc, &amp;argv);</text:span></text:p>
      <text:p text:style-name="Preformatted_20_Text"/>
      <text:p text:style-name="Preformatted_20_Text"><text:span text:style-name="Source_20_Text"><text:s text:c="4"/>int rank, size;</text:span></text:p>
      <text:p text:style-name="Preformatted_20_Text"><text:span text:style-name="Source_20_Text"><text:s text:c="4"/>MPI_Comm_rank(MPI_COMM_WORLD, &amp;rank);</text:span></text:p>
      <text:p text:style-name="Preformatted_20_Text"><text:span text:style-name="Source_20_Text"><text:s text:c="4"/>MPI_Comm_size(MPI_COMM_WORLD, &amp;size);</text:span></text:p>
      <text:p text:style-name="Preformatted_20_Text"/>
      <text:p text:style-name="Preformatted_20_Text"><text:span text:style-name="Source_20_Text"><text:s text:c="4"/>/* ---------------------------------------------------------</text:span></text:p>
      <text:p text:style-name="Preformatted_20_Text"><text:span text:style-name="Source_20_Text"><text:s text:c="7"/>1. Partition the problem (global_n is the total size)</text:span></text:p>
      <text:p text:style-name="Preformatted_20_Text"><text:span text:style-name="Source_20_Text"><text:s text:c="7"/>--------------------------------------------------------- */</text:span></text:p>
      <text:p text:style-name="Preformatted_20_Text"><text:span text:style-name="Source_20_Text"><text:s text:c="4"/>const long long int global_n = 100000000LL; <text:s text:c="2"/>// example size</text:span></text:p>
      <text:p text:style-name="Preformatted_20_Text"><text:span text:style-name="Source_20_Text"><text:s text:c="4"/>long long int chunk = global_n / size;</text:span></text:p>
      <text:p text:style-name="Preformatted_20_Text"><text:span text:style-name="Source_20_Text"><text:s text:c="4"/>long long int remainder = global_n % size;</text:span></text:p>
      <text:p text:style-name="Preformatted_20_Text"/>
      <text:p text:style-name="Preformatted_20_Text"><text:span text:style-name="Source_20_Text"><text:s text:c="4"/>/* give the first 'remainder' ranks one extra element */</text:span></text:p>
      <text:p text:style-name="Preformatted_20_Text"><text:span text:style-name="Source_20_Text"><text:s text:c="4"/>long long int my_len = chunk + (rank &lt; remainder ? 1 : 0);</text:span></text:p>
      <text:p text:style-name="Preformatted_20_Text"><text:span text:style-name="Source_20_Text"><text:s text:c="4"/>long long int my_start = rank * chunk + (rank &lt; remainder ? rank : remainder);</text:span></text:p>
      <text:p text:style-name="Preformatted_20_Text"/>
      <text:p text:style-name="Preformatted_20_Text"><text:span text:style-name="Source_20_Text"><text:s text:c="4"/>/* ---------------------------------------------------------</text:span></text:p>
      <text:p text:style-name="Preformatted_20_Text"><text:span text:style-name="Source_20_Text"><text:s text:c="7"/>2. Do the work locally</text:span></text:p>
      <text:p text:style-name="Preformatted_20_Text"><text:span text:style-name="Source_20_Text"><text:s text:c="7"/>--------------------------------------------------------- */</text:span></text:p>
      <text:p text:style-name="Preformatted_20_Text"><text:span text:style-name="Source_20_Text"><text:s text:c="4"/>long long int local_result = heavy_work(my_start, my_len);</text:span></text:p>
      <text:p text:style-name="Preformatted_20_Text"/>
      <text:p text:style-name="Preformatted_20_Text"><text:span text:style-name="Source_20_Text"><text:s text:c="4"/>/* ---------------------------------------------------------</text:span></text:p>
      <text:p text:style-name="Preformatted_20_Text"><text:span text:style-name="Source_20_Text"><text:s text:c="7"/>3. Reduce the partial results (Allreduce so everyone gets it)</text:span></text:p>
      <text:p text:style-name="Preformatted_20_Text"><text:span text:style-name="Source_20_Text"><text:s text:c="7"/>--------------------------------------------------------- */</text:span></text:p>
      <text:p text:style-name="Preformatted_20_Text"><text:span text:style-name="Source_20_Text"><text:s text:c="4"/>long long int global_result;</text:span></text:p>
      <text:p text:style-name="Preformatted_20_Text"><text:span text:style-name="Source_20_Text"><text:s text:c="4"/>MPI_Allreduce(&amp;local_result, &amp;global_result, 1,</text:span></text:p>
      <text:p text:style-name="Preformatted_20_Text"><text:span text:style-name="Source_20_Text"><text:s text:c="18"/>MPI_LONG_LONG, MPI_SUM, MPI_COMM_WORLD);</text:span></text:p>
      <text:p text:style-name="Preformatted_20_Text"/>
      <text:p text:style-name="Preformatted_20_Text"><text:span text:style-name="Source_20_Text"><text:s text:c="4"/>if (rank == 0)</text:span></text:p>
      <text:p text:style-name="Preformatted_20_Text"><text:span text:style-name="Source_20_Text"><text:s text:c="8"/>printf("global result = %lld\n", global_result);</text:span></text:p>
      <text:p text:style-name="Preformatted_20_Text"/>
      <text:p text:style-name="Preformatted_20_Text"><text:span text:style-name="Source_20_Text"><text:s text:c="4"/>MPI_Finalize();</text:span></text:p>
      <text:p text:style-name="Preformatted_20_Text"><text:soft-page-break/><text:span text:style-name="Source_20_Text"><text:s text:c="4"/>return 0;</text:span></text:p>
      <text:p text:style-name="P15"><text:span text:style-name="Source_20_Text">}</text:span></text:p>
      <text:p text:style-name="Text_20_body"><text:span text:style-name="Strong_20_Emphasis">What changes?</text:span></text:p>
      <text:list text:style-name="L37">
        <text:list-item>
          <text:p text:style-name="P94">The <text:span text:style-name="Strong_20_Emphasis">data set (</text:span><text:span text:style-name="Strong_20_Emphasis"><text:span text:style-name="Source_20_Text">global_n</text:span></text:span><text:span text:style-name="Strong_20_Emphasis">) is split</text:span> evenly among the ranks. </text:p>
        </text:list-item>
        <text:list-item>
          <text:p text:style-name="P94"><text:span text:style-name="Strong_20_Emphasis">Every rank calls </text:span><text:span text:style-name="Strong_20_Emphasis"><text:span text:style-name="Source_20_Text">heavy_work</text:span></text:span> – the inclusive time for that function will now be distributed. </text:p>
        </text:list-item>
        <text:list-item>
          <text:p text:style-name="P93"><text:span text:style-name="Strong_20_Emphasis"><text:span text:style-name="Source_20_Text">MPI_Allreduce</text:span></text:span> replaces the <text:span text:style-name="Source_20_Text">MPI_Reduce</text:span> you had; all ranks participate, so none sit idle waiting for Rank 0. </text:p>
        </text:list-item>
      </text:list>
      <text:p text:style-name="Text_20_body">Compile and run with <text:span text:style-name="Source_20_Text">mpirun -np 4 ./myprog</text:span>. When you open the resulting <text:span text:style-name="Source_20_Text">.cube</text:span> file, you should see:</text:p>
      <text:p text:style-name="Preformatted_20_Text"><text:span text:style-name="Source_20_Text">System tree → MPI Rank 0 … 1.5 s</text:span></text:p>
      <text:p text:style-name="Preformatted_20_Text"><text:span text:style-name="Source_20_Text">System tree → MPI Rank 1 … 1.5 s</text:span></text:p>
      <text:p text:style-name="Preformatted_20_Text"><text:span text:style-name="Source_20_Text">System tree → MPI Rank 2 … 1.5 s</text:span></text:p>
      <text:p text:style-name="P15"><text:span text:style-name="Source_20_Text">System tree → MPI Rank 3 … 1.5 s</text:span></text:p>
      <text:p text:style-name="Text_20_body">(and the <text:span text:style-name="Strong_20_Emphasis">Load‑Imbalance Factor</text:span> will be ≈ 1.0).</text:p>
      <text:p text:style-name="Horizontal_20_Line"/>
      <text:h text:style-name="Heading_20_2" text:outline-level="2">7. TL;DR – What you should do right now</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tep</text:p>
            </table:table-cell>
            <table:table-cell table:style-name="Table27.A1" office:value-type="string">
              <text:p text:style-name="Table_20_Heading">Action inside CubeGUI</text:p>
            </table:table-cell>
            <table:table-cell table:style-name="Table27.A1" office:value-type="string">
              <text:p text:style-name="Table_20_Heading">Follow‑up code change</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Open the <text:span text:style-name="Strong_20_Emphasis">System Tree</text:span>, select <text:span text:style-name="Strong_20_Emphasis">Inclusive Time</text:span> per rank, sort → you’ll see Rank 0 ≈ 5.6 s, others ≈ 0.03 s.</text:p>
          </table:table-cell>
          <table:table-cell table:style-name="Table27.A1" office:value-type="string">
            <text:p text:style-name="Table_20_Contents">Confirm that only Rank 0 enters <text:span text:style-name="Source_20_Text">heavy_work</text:span>.</text:p>
          </table:table-cell>
        </table:table-row>
        <table:table-row>
          <table:table-cell table:style-name="Table27.A1" office:value-type="string">
            <text:p text:style-name="Table_20_Contents">2️⃣</text:p>
          </table:table-cell>
          <table:table-cell table:style-name="Table27.A1" office:value-type="string">
            <text:p text:style-name="Table_20_Contents">In the <text:span text:style-name="Strong_20_Emphasis">Call Tree</text:span>, click on <text:span text:style-name="Source_20_Text">heavy_work</text:span> → you’ll see its inclusive time listed <text:span text:style-name="Strong_20_Emphasis">once</text:span> (the 0.023 s value).</text:p>
          </table:table-cell>
          <table:table-cell table:style-name="Table27.A1" office:value-type="string">
            <text:p text:style-name="Table_20_Contents">Replace the <text:span text:style-name="Source_20_Text">if (rank==0) heavy_work(...);</text:span> with a <text:span text:style-name="Strong_20_Emphasis">balanced loop</text:span> (see example).</text:p>
          </table:table-cell>
        </table:table-row>
        <table:table-row>
          <table:table-cell table:style-name="Table27.A1" office:value-type="string">
            <text:p text:style-name="Table_20_Contents">3️⃣</text:p>
          </table:table-cell>
          <table:table-cell table:style-name="Table27.A1" office:value-type="string">
            <text:p text:style-name="Table_20_Contents">Switch the reduction to <text:span text:style-name="Strong_20_Emphasis">MPI_Allreduce</text:span> (or a non‑blocking <text:span text:style-name="Source_20_Text">MPI_Ireduce</text:span>).</text:p>
          </table:table-cell>
          <table:table-cell table:style-name="Table27.A1" office:value-type="string">
            <text:p text:style-name="Table_20_Contents">Re‑compile and re‑run.</text:p>
          </table:table-cell>
        </table:table-row>
        <table:table-row>
          <table:table-cell table:style-name="Table27.A1" office:value-type="string">
            <text:p text:style-name="Table_20_Contents">4️⃣</text:p>
          </table:table-cell>
          <table:table-cell table:style-name="Table27.A1" office:value-type="string">
            <text:p text:style-name="Table_20_Contents">Re‑open the new <text:span text:style-name="Source_20_Text">.cube</text:span> file → the per‑rank times should now be roughly equal and the <text:span text:style-name="Strong_20_Emphasis">Load‑Imbalance Factor</text:span> close to <text:span text:style-name="Strong_20_Emphasis">1</text:span>.</text:p>
          </table:table-cell>
          <table:table-cell table:style-name="Table27.A1" office:value-type="string">
            <text:p text:style-name="Table_20_Contents">If still unbalanced, consider <text:span text:style-name="Strong_20_Emphasis">dynamic work stealing</text:span> or <text:span text:style-name="Strong_20_Emphasis">hybrid MPI+OpenMP</text:span> inside each rank.</text:p>
          </table:table-cell>
        </table:table-row>
      </table:table>
      <text:p text:style-name="Text_20_body">Once the per‑rank inclusive times are balanced, the overall runtime will drop from ~6 s (dominated by the idle waiting of the three idle ranks) to roughly <text:span text:style-name="Strong_20_Emphasis">the time needed for </text:span><text:span text:style-name="Strong_20_Emphasis"><text:span text:style-name="Source_20_Text">heavy_work</text:span></text:span><text:span text:style-name="Strong_20_Emphasis"> divided by the number of ranks</text:span> (plus a tiny MPI overhead). In the example above you could expect a speed‑up of about <text:span text:style-name="Strong_20_Emphasis">4×</text:span> (5.6 s → ≈ 1.5 s).</text:p>
      <text:p text:style-name="Horizontal_20_Line"/>
      <text:h text:style-name="Heading_20_3" text:outline-level="3">Need more help?</text:h>
      <text:p text:style-name="Text_20_body"><text:span text:style-name="Emphasis">If you can share a tiny excerpt of the actual source that calls </text:span><text:span text:style-name="Emphasis"><text:span text:style-name="Source_20_Text">heavy_work</text:span></text:span><text:span text:style-name="Emphasis">, I can point out exactly where to insert the partitioning logic.</text:span><text:line-break/><text:span text:style-name="Emphasis">If you prefer to keep the existing code structure, I can also show you how to add a </text:span><text:span text:style-name="Emphasis"><text:span text:style-name="Strong_20_Emphasis">master‑worker</text:span></text:span><text:span text:style-name="Emphasis"> task‑stealing loop using only MPI primitives.</text:span> </text:p>
      <text:p text:style-name="Text_20_body"><text:soft-page-break/>Just let me know which route you want to take, and we can flesh out the exact implementation details. Happy profil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9:56:10.290521138</meta:creation-date>
    <dc:date>2026-06-14T22:15:24.697048542</dc:date>
    <meta:editing-duration>PT2H40M59S</meta:editing-duration>
    <meta:editing-cycles>6</meta:editing-cycles>
    <meta:generator>LibreOffice/24.2.7.2$Linux_X86_64 LibreOffice_project/420$Build-2</meta:generator>
    <meta:document-statistic meta:table-count="27" meta:image-count="0" meta:object-count="0" meta:page-count="26" meta:paragraph-count="854" meta:word-count="8002" meta:character-count="52117" meta:non-whitespace-character-count="43858"/>
  </office:meta>
</office:document-meta>
</file>